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32000000443C2ED9C5.png" manifest:media-type="image/png"/>
  <manifest:file-entry manifest:full-path="Pictures/10000001000009CC0000035A81936D57.png" manifest:media-type="image/png"/>
  <manifest:file-entry manifest:full-path="Pictures/10000001000009B400000450FF9D3903.png" manifest:media-type="image/png"/>
  <manifest:file-entry manifest:full-path="Pictures/10000000000008640000053400C07967.bmp" manifest:media-type="image/bmp"/>
  <manifest:file-entry manifest:full-path="Pictures/1000000100000404000003F28A995282.png" manifest:media-type="image/png"/>
  <manifest:file-entry manifest:full-path="Pictures/10000001000009B20000044ACE86E334.png" manifest:media-type="image/png"/>
  <manifest:file-entry manifest:full-path="Pictures/10000001000005100000043C0F95A4FD.png" manifest:media-type="image/png"/>
  <manifest:file-entry manifest:full-path="Pictures/10000001000009A2000003E879890A35.png" manifest:media-type="image/png"/>
  <manifest:file-entry manifest:full-path="Pictures/10000001000006260000049EC9D1466B.png" manifest:media-type="image/png"/>
  <manifest:file-entry manifest:full-path="Pictures/10000001000004320000040AFDECDDEC.png" manifest:media-type="image/png"/>
  <manifest:file-entry manifest:full-path="Pictures/10000001000005E600000444BC289DE9.png" manifest:media-type="image/png"/>
  <manifest:file-entry manifest:full-path="Pictures/10000001000009B2000001E8E2CF9572.png" manifest:media-type="image/png"/>
  <manifest:file-entry manifest:full-path="Pictures/100000010000012600000040BF19988A.png" manifest:media-type="image/png"/>
  <manifest:file-entry manifest:full-path="Pictures/10000001000004D600000344E440D936.png" manifest:media-type="image/png"/>
  <manifest:file-entry manifest:full-path="Pictures/100000010000047C000003C8CBAC81EF.png" manifest:media-type="image/png"/>
  <manifest:file-entry manifest:full-path="Pictures/100000010000094C0000047E381D3134.png" manifest:media-type="image/png"/>
  <manifest:file-entry manifest:full-path="Pictures/10000001000001100000003C1D434415.png" manifest:media-type="image/png"/>
  <manifest:file-entry manifest:full-path="Pictures/10000001000000EE0000003E461B2F18.png" manifest:media-type="image/png"/>
  <manifest:file-entry manifest:full-path="Pictures/10000001000005F00000026255573801.png" manifest:media-type="image/png"/>
  <manifest:file-entry manifest:full-path="Pictures/10000001000009C800000312DB98B1C8.png" manifest:media-type="image/png"/>
  <manifest:file-entry manifest:full-path="Pictures/10000001000004A40000017CEE863A4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921cm" fo:margin-left="0.002cm" fo:margin-top="0cm" fo:margin-bottom="0cm" table:align="left" style:writing-mode="page"/>
    </style:style>
    <style:style style:name="Таблица1.A" style:family="table-column">
      <style:table-column-properties style:column-width="6.174cm"/>
    </style:style>
    <style:style style:name="Таблица1.B" style:family="table-column">
      <style:table-column-properties style:column-width="4.87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d9d9d9" fo:padding-left="0.212cm" fo:padding-right="0.212cm" fo:padding-top="0.141cm" fo:padding-bottom="0.141cm" fo:border="0.1pt solid #000000">
        <style:background-image/>
      </style:table-cell-properties>
    </style:style>
    <style:style style:name="Таблица1.A2" style:family="table-cell">
      <style:table-cell-properties fo:background-color="#ffffff" fo:padding-left="0.212cm" fo:padding-right="0.212cm" fo:padding-top="0.141cm" fo:padding-bottom="0.141cm" fo:border="0.1pt solid #000000">
        <style:background-image/>
      </style:table-cell-properties>
    </style:style>
    <style:style style:name="Таблица2" style:family="table">
      <style:table-properties style:width="15.921cm" fo:margin-left="0.002cm" fo:margin-top="0cm" fo:margin-bottom="0cm" table:align="left" style:writing-mode="page"/>
    </style:style>
    <style:style style:name="Таблица2.A" style:family="table-column">
      <style:table-column-properties style:column-width="6.174cm"/>
    </style:style>
    <style:style style:name="Таблица2.B" style:family="table-column">
      <style:table-column-properties style:column-width="4.87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#d9d9d9" fo:padding-left="0.212cm" fo:padding-right="0.212cm" fo:padding-top="0.141cm" fo:padding-bottom="0.141cm" fo:border="0.1pt solid #000000">
        <style:background-image/>
      </style:table-cell-properties>
    </style:style>
    <style:style style:name="Таблица2.A2" style:family="table-cell">
      <style:table-cell-properties fo:background-color="#ffffff" fo:padding-left="0.212cm" fo:padding-right="0.212cm" fo:padding-top="0.141cm" fo:padding-bottom="0.141cm" fo:border="0.1pt solid #000000">
        <style:background-image/>
      </style:table-cell-properties>
    </style:style>
    <style:style style:name="P1" style:family="paragraph" style:parent-style-name="Standard">
      <style:paragraph-properties fo:margin-top="0.353cm" fo:margin-bottom="0.212cm" style:contextual-spacing="false" fo:line-height="115%" fo:text-align="center" style:justify-single-word="false"/>
    </style:style>
    <style:style style:name="P2" style:family="paragraph" style:parent-style-name="Standard">
      <style:paragraph-properties fo:margin-top="0cm" fo:margin-bottom="0.212cm" style:contextual-spacing="false" fo:line-height="115%" fo:text-align="center" style:justify-single-word="false"/>
    </style:style>
    <style:style style:name="P3" style:family="paragraph" style:parent-style-name="Standard">
      <style:paragraph-properties fo:margin-top="0cm" fo:margin-bottom="0.212cm" style:contextual-spacing="false" fo:line-height="115%"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margin-top="0cm" fo:margin-bottom="0.212cm" style:contextual-spacing="false" fo:text-align="right" style:justify-single-word="false"/>
    </style:style>
    <style:style style:name="P5" style:family="paragraph" style:parent-style-name="Heading_20_1">
      <style:paragraph-properties fo:margin-top="0cm" fo:margin-bottom="0.212cm" style:contextual-spacing="false" fo:break-before="page"/>
    </style:style>
    <style:style style:name="P6" style:family="paragraph" style:parent-style-name="Standard">
      <style:paragraph-properties fo:margin-top="0cm" fo:margin-bottom="0.212cm" style:contextual-spacing="false" fo:line-height="115%" fo:text-align="justify" style:justify-single-word="false" fo:text-indent="1.27cm" style:auto-text-indent="false" loext:word-spacing-minimum="75%" loext:word-spacing-maximum="133%"/>
    </style:style>
    <style:style style:name="P7" style:family="paragraph" style:parent-style-name="List_20_Paragraph" style:list-style-name="WWNum2">
      <style:paragraph-properties fo:margin-top="0cm" fo:margin-bottom="0.141cm" style:contextual-spacing="false"/>
    </style:style>
    <style:style style:name="P8" style:family="paragraph" style:parent-style-name="Standard">
      <style:paragraph-properties fo:margin-top="0.141cm" fo:margin-bottom="0.212cm" style:contextual-spacing="false" fo:line-height="115%" fo:text-align="center" style:justify-single-word="false"/>
    </style:style>
    <style:style style:name="P9" style:family="paragraph" style:parent-style-name="Heading_20_2">
      <style:paragraph-properties fo:margin-top="0.353cm" fo:margin-bottom="0.176cm" style:contextual-spacing="false"/>
    </style:style>
    <style:style style:name="P10" style:family="paragraph" style:parent-style-name="Standard">
      <style:paragraph-properties fo:margin-top="0cm" fo:margin-bottom="0.071cm" style:contextual-spacing="false"/>
    </style:style>
    <style:style style:name="P11" style:family="paragraph" style:parent-style-name="Standard">
      <style:paragraph-properties fo:margin-top="0cm" fo:margin-bottom="0.071cm" style:contextual-spacing="false"/>
      <style:text-properties style:font-name="Courier New" fo:font-size="10pt" fo:language="en" fo:country="US" style:font-name-asian="Courier New1" style:font-size-asian="10pt" style:font-name-complex="Courier New1" style:font-size-complex="10pt"/>
    </style:style>
    <style:style style:name="P12" style:family="paragraph" style:parent-style-name="Standard">
      <style:paragraph-properties fo:margin-top="0.071cm" fo:margin-bottom="0.212cm" style:contextual-spacing="false" fo:line-height="115%" fo:text-align="center" style:justify-single-word="false"/>
    </style:style>
    <style:style style:name="P13" style:family="paragraph" style:parent-style-name="Standard">
      <style:paragraph-properties fo:margin-left="0cm" fo:margin-top="0cm" fo:margin-bottom="0.212cm" style:contextual-spacing="false" fo:line-height="115%" fo:text-align="justify" style:justify-single-word="false" fo:text-indent="0cm" style:auto-text-indent="false" loext:word-spacing-minimum="75%" loext:word-spacing-maximum="133%"/>
    </style:style>
    <style:style style:name="P14" style:family="paragraph" style:parent-style-name="Standard">
      <style:paragraph-properties fo:margin-top="0cm" fo:margin-bottom="0.071cm" style:contextual-spacing="false"/>
      <style:text-properties style:font-name="Courier New" fo:font-size="10pt" style:font-name-asian="Courier New1" style:font-size-asian="10pt" style:font-name-complex="Courier New1" style:font-size-complex="10pt"/>
    </style:style>
    <style:style style:name="P15" style:family="paragraph" style:parent-style-name="Standard">
      <style:paragraph-properties fo:margin-top="0cm" fo:margin-bottom="0.071cm" style:contextual-spacing="false"/>
      <style:text-properties fo:language="en" fo:country="US"/>
    </style:style>
    <style:style style:name="P1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2pt" style:font-size-asian="12pt" style:font-size-complex="12pt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1" style:family="paragraph" style:parent-style-name="List_20_Paragraph" style:list-style-name="WWNum3">
      <style:paragraph-properties fo:margin-top="0cm" fo:margin-bottom="0.141cm" style:contextual-spacing="false"/>
    </style:style>
    <style:style style:name="T1" style:family="text">
      <style:text-properties officeooo:rsid="00142ee4"/>
    </style:style>
    <style:style style:name="T2" style:family="text">
      <style:text-properties officeooo:rsid="001818d3"/>
    </style:style>
    <style:style style:name="T3" style:family="text">
      <style:text-properties fo:language="en" fo:country="US"/>
    </style:style>
    <style:style style:name="T4" style:family="text">
      <style:text-properties style:font-name="Courier New" fo:font-size="10pt" fo:language="en" fo:country="US" style:font-name-asian="Courier New1" style:font-size-asian="10pt" style:font-name-complex="Courier New1" style:font-size-complex="10pt"/>
    </style:style>
    <style:style style:name="T5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T6" style:family="text">
      <style:text-properties fo:color="#888888" loext:opacity="100%" fo:font-size="12pt" fo:font-style="italic" style:font-size-asian="12pt" style:font-style-asian="italic" style:font-size-complex="12pt" style:font-style-complex="italic"/>
    </style:style>
    <style:style style:name="T7" style:family="text">
      <style:text-properties fo:color="#888888" loext:opacity="100%" style:font-name="Courier New" fo:font-size="12pt" fo:font-style="italic" style:font-name-asian="Courier New1" style:font-size-asian="12pt" style:font-style-asian="italic" style:font-name-complex="Courier New1" style:font-size-complex="12pt" style:font-style-complex="italic"/>
    </style:style>
    <style:style style:name="T8" style:family="text">
      <style:text-properties fo:font-size="12pt" fo:language="en" fo:country="US" style:font-size-asian="12pt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officeooo:rsid="001662b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2">Федеральное государственное бюджетное образовательное учреждение высшего образования</text:p>
      <text:p text:style-name="P3">САНКТ-ПЕТЕРБУРГСКИЙ ГОСУДАРСТВЕННЫЙ УНИВЕРСИТЕТ ИТМО</text:p>
      <text:p text:style-name="Standard"/>
      <text:p text:style-name="Standard"/>
      <text:p text:style-name="Standard"/>
      <text:p text:style-name="P3">ОТЧЁТ</text:p>
      <text:p text:style-name="P3">по лабораторной работе №4</text:p>
      <text:p text:style-name="P3">Запросы на выборку и модификацию данных. Представления. Работа с индексами</text:p>
      <text:p text:style-name="Standard"/>
      <text:p text:style-name="Standard"/>
      <text:p text:style-name="Standard"/>
      <text:p text:style-name="P4">Выполнил:<text:tab/><text:span text:style-name="T1">Ковалев Руслан Бабекович</text:span></text:p>
      <text:p text:style-name="P4">Группа:<text:tab/>K3242</text:p>
      <text:p text:style-name="P4">1068 <text:span text:style-name="T2">FPIN</text:span></text:p>
      <text:p text:style-name="Standard"/>
      <text:p text:style-name="Standard"/>
      <text:p text:style-name="Standard"/>
      <text:p text:style-name="P2">Санкт-Петербург,<text:span text:style-name="T1">2026</text:span></text:p>
      <text:p text:style-name="Standard"/>
      <text:h text:style-name="P5" text:outline-level="1">1 <text:s/>Цель работы</text:h>
      <text:p text:style-name="P6">Овладеть практическими навыками создания представлений и запросов на выборку данных к базе данных PostgreSQL, использования подзапросов при модификации данных и индексов.</text:p>
      <text:h text:style-name="Heading_20_1" text:outline-level="1">2 <text:s/>Практическое задание</text:h>
      <text:p text:style-name="P6">В соответствии с вариантом 6 (база данных Пассажир) выполнить:</text:p>
      <text:list text:style-name="WWNum2">
        <text:list-item text:start-value="1">
          <text:p text:style-name="P7">создать запросы на выборку данных согласно индивидуальному заданию (часть 2);</text:p>
        </text:list-item>
        <text:list-item>
          <text:p text:style-name="P7">создать представления согласно индивидуальному заданию (часть 3);</text:p>
        </text:list-item>
        <text:list-item>
          <text:p text:style-name="P7">составить 3 запроса на модификацию данных (INSERT, UPDATE, DELETE) с использованием подзапросов;</text:p>
        </text:list-item>
        <text:list-item>
          <text:p text:style-name="P7">создать простой и составной индексы для двух произвольных запросов и сравнить время выполнения запросов без индексов и с индексами.</text:p>
        </text:list-item>
      </text:list>
      <text:h text:style-name="Heading_20_1" text:outline-level="1">3 <text:s/>Схема базы данных (ERD)</text:h>
      <text:p text:style-name="P6"><text:span text:style-name="T1">Сделал схему еще в лабе 3</text:span>. На рисунке 1 <text:span text:style-name="T1">схема сгенер в pgAdmin4</text:span>. <draw:frame draw:style-name="fr1" draw:name="Рисунок 1" text:anchor-type="as-char" svg:width="16.378cm" svg:height="9.79cm" draw:z-index="0"><draw:image xlink:href="Pictures/10000001000004D600000344E440D936.png" xlink:type="simple" xlink:show="embed" xlink:actuate="onLoad" draw:mime-type="image/png"/></draw:frame></text:p>
      <text:p text:style-name="P8">Рисунок 1 - Логическая модель базы данных «Пассажир»</text:p>
      <text:h text:style-name="Heading_20_1" text:outline-level="1">4 <text:s/>Запросы на выборку данных</text:h>
      <text:h text:style-name="P9" text:outline-level="2">Запрос 2.1: Свободные места на все поезда, отправляющиеся с вокзала в течение следующих суток</text:h>
      <text:p text:style-name="P6"><text:soft-page-break/>SQL-команда:</text:p>
      <text:p text:style-name="P10" loext:marker-style-name="T3"><text:span text:style-name="T4">SELECT</text:span><text:span text:style-name="T4"/></text:p>
      <text:p text:style-name="P10" loext:marker-style-name="T3"><text:span text:style-name="T4"><text:s text:c="4"/>r.id_route,</text:span><text:span text:style-name="T4"/></text:p>
      <text:p text:style-name="P10" loext:marker-style-name="T3"><text:span text:style-name="T4"><text:s text:c="4"/>r.departure_point,</text:span><text:span text:style-name="T4"/></text:p>
      <text:p text:style-name="P10" loext:marker-style-name="T3"><text:span text:style-name="T4"><text:s text:c="4"/>r.destination_point,</text:span><text:span text:style-name="T4"/></text:p>
      <text:p text:style-name="P10" loext:marker-style-name="T3"><text:span text:style-name="T4"><text:s text:c="4"/>r.departure_time,</text:span><text:span text:style-name="T4"/></text:p>
      <text:p text:style-name="P10" loext:marker-style-name="T3"><text:span text:style-name="T4"><text:s text:c="4"/>tc.name <text:s text:c="7"/>AS car_type,</text:span><text:span text:style-name="T4"/></text:p>
      <text:p text:style-name="P10" loext:marker-style-name="T3"><text:span text:style-name="T4"><text:s text:c="4"/>rc.car_number,</text:span><text:span text:style-name="T4"/></text:p>
      <text:p text:style-name="P10" loext:marker-style-name="T3"><text:span text:style-name="T4"><text:s text:c="4"/>s.number_seat,</text:span><text:span text:style-name="T4"/></text:p>
      <text:p text:style-name="P10" loext:marker-style-name="T3"><text:span text:style-name="T4"><text:s text:c="4"/>s.type_seat</text:span><text:span text:style-name="T4"/></text:p>
      <text:p text:style-name="P10" loext:marker-style-name="T3"><text:span text:style-name="T4">FROM laba.route r</text:span><text:span text:style-name="T4"/></text:p>
      <text:p text:style-name="P10" loext:marker-style-name="T3"><text:span text:style-name="T4">JOIN laba.trip tr <text:s text:c="6"/>ON tr.id_route = r.id_route</text:span><text:span text:style-name="T4"/></text:p>
      <text:p text:style-name="P10" loext:marker-style-name="T3"><text:span text:style-name="T4">JOIN laba.train_set ts <text:s/>ON ts.id_trip <text:s/>= tr.id_trip</text:span><text:span text:style-name="T4"/></text:p>
      <text:p text:style-name="P10" loext:marker-style-name="T3"><text:span text:style-name="T4">JOIN laba.railway_car rc ON rc.id_car <text:s/>= ts.id_car</text:span><text:span text:style-name="T4"/></text:p>
      <text:p text:style-name="P10" loext:marker-style-name="T3"><text:span text:style-name="T4">JOIN laba.type_car tc <text:s text:c="2"/>ON tc.id_type_car = rc.id_type_car</text:span><text:span text:style-name="T4"/></text:p>
      <text:p text:style-name="P10" loext:marker-style-name="T3"><text:span text:style-name="T4">JOIN laba.seat s <text:s text:c="7"/>ON s.id_seat <text:s text:c="2"/>= ts.id_seat</text:span><text:span text:style-name="T4"/></text:p>
      <text:p text:style-name="P10" loext:marker-style-name="T3"><text:span text:style-name="T4">WHERE tr.planned_date BETWEEN CURRENT_DATE AND CURRENT_DATE + INTERVAL '1 day'</text:span><text:span text:style-name="T4"/></text:p>
      <text:p text:style-name="P10" loext:marker-style-name="T3"><text:span text:style-name="T4"><text:s text:c="2"/>AND ts.status = 'free'</text:span><text:span text:style-name="T4"/></text:p>
      <text:p text:style-name="P11">ORDER BY r.departure_time, rc.car_number, s.number_seat;</text:p>
      <text:p text:style-name="P10"><draw:frame draw:style-name="fr1" draw:name="Изображение2" text:anchor-type="as-char" svg:width="16.501cm" svg:height="10.232cm" draw:z-index="1"><draw:image xlink:href="Pictures/10000000000008640000053400C07967.bmp" xlink:type="simple" xlink:show="embed" xlink:actuate="onLoad" draw:mime-type="image/bmp"/></draw:frame></text:p>
      <text:p text:style-name="P12">Рисунок - результат выполнения запроса 2.1</text:p>
      <text:p text:style-name="Standard"/>
      <text:h text:style-name="P9" text:outline-level="2">Запрос 2.2: Список поездов за прошедшие сутки с максимальной выручкой от продажи билетов</text:h>
      <text:p text:style-name="P6"/>
      <text:p text:style-name="P6"/>
      <text:p text:style-name="P6"><text:soft-page-break/>SQL-команда:</text:p>
      <text:p text:style-name="P10" loext:marker-style-name="T3"><text:span text:style-name="T4">WITH revenue AS (</text:span><text:span text:style-name="T4"/></text:p>
      <text:p text:style-name="P10" loext:marker-style-name="T3"><text:span text:style-name="T4"><text:s text:c="4"/>SELECT</text:span><text:span text:style-name="T4"/></text:p>
      <text:p text:style-name="P10" loext:marker-style-name="T3"><text:span text:style-name="T4"><text:s text:c="8"/>r.id_route,</text:span><text:span text:style-name="T4"/></text:p>
      <text:p text:style-name="P10" loext:marker-style-name="T3"><text:span text:style-name="T4"><text:s text:c="8"/>r.departure_point,</text:span><text:span text:style-name="T4"/></text:p>
      <text:p text:style-name="P10" loext:marker-style-name="T3"><text:span text:style-name="T4"><text:s text:c="8"/>r.destination_point,</text:span><text:span text:style-name="T4"/></text:p>
      <text:p text:style-name="P10" loext:marker-style-name="T3"><text:span text:style-name="T4"><text:s text:c="8"/>SUM(t.price) AS total_revenue</text:span><text:span text:style-name="T4"/></text:p>
      <text:p text:style-name="P10" loext:marker-style-name="T3"><text:span text:style-name="T4"><text:s text:c="4"/>FROM laba.ticket t</text:span><text:span text:style-name="T4"/></text:p>
      <text:p text:style-name="P10" loext:marker-style-name="T3"><text:span text:style-name="T4"><text:s text:c="4"/>JOIN laba.route r ON r.id_route = t.id_route</text:span><text:span text:style-name="T4"/></text:p>
      <text:p text:style-name="P10" loext:marker-style-name="T3"><text:span text:style-name="T4"><text:s text:c="4"/>JOIN laba.trip tr ON tr.id_route = r.id_route</text:span><text:span text:style-name="T4"/></text:p>
      <text:p text:style-name="P10" loext:marker-style-name="T3"><text:span text:style-name="T4"><text:s text:c="4"/>WHERE tr.planned_date = CURRENT_DATE - INTERVAL '1 day'</text:span><text:span text:style-name="T4"/></text:p>
      <text:p text:style-name="P10" loext:marker-style-name="T3"><text:span text:style-name="T4"><text:s text:c="6"/>AND t.payment_status = 'paid'</text:span><text:span text:style-name="T4"/></text:p>
      <text:p text:style-name="P10" loext:marker-style-name="T3"><text:span text:style-name="T4"><text:s text:c="4"/>GROUP BY r.id_route, r.departure_point, r.destination_point</text:span><text:span text:style-name="T4"/></text:p>
      <text:p text:style-name="P10" loext:marker-style-name="T3"><text:span text:style-name="T4">)</text:span><text:span text:style-name="T4"/></text:p>
      <text:p text:style-name="P10" loext:marker-style-name="T3"><text:span text:style-name="T4">SELECT *</text:span><text:span text:style-name="T4"/></text:p>
      <text:p text:style-name="P10" loext:marker-style-name="T3"><text:span text:style-name="T4">FROM revenue</text:span><text:span text:style-name="T4"/></text:p>
      <text:p text:style-name="P10" loext:marker-style-name="T3"><text:span text:style-name="T4">WHERE total_revenue = (SELECT MAX(total_revenue) FROM revenue);</text:span><text:span text:style-name="T3"> </text:span><draw:frame draw:style-name="fr1" draw:name="Изображение3" text:anchor-type="as-char" svg:width="13.638cm" svg:height="11.501cm" draw:z-index="2"><draw:image xlink:href="Pictures/100000010000047C000003C8CBAC81EF.png" xlink:type="simple" xlink:show="embed" xlink:actuate="onLoad" draw:mime-type="image/png"/></draw:frame></text:p>
      <text:p text:style-name="P12">Рисунок - результат выполнения запроса 2.2</text:p>
      <text:p text:style-name="Standard"/>
      <text:h text:style-name="P9" text:outline-level="2">Запрос 2.3: Номера поездов, на которые проданы все билеты на следующие сутки</text:h>
      <text:p text:style-name="P13"/>
      <text:p text:style-name="P6"/>
      <text:p text:style-name="P6"><text:soft-page-break/>SQL-команда:</text:p>
      <text:p text:style-name="P10" loext:marker-style-name="T3"><text:span text:style-name="T4">SELECT</text:span><text:span text:style-name="T4"/></text:p>
      <text:p text:style-name="P10" loext:marker-style-name="T3"><text:span text:style-name="T4"><text:s text:c="4"/>tr.id_trip,</text:span><text:span text:style-name="T4"/></text:p>
      <text:p text:style-name="P10" loext:marker-style-name="T3"><text:span text:style-name="T4"><text:s text:c="4"/>r.id_route,</text:span><text:span text:style-name="T4"/></text:p>
      <text:p text:style-name="P10" loext:marker-style-name="T3"><text:span text:style-name="T4"><text:s text:c="4"/>r.departure_point,</text:span><text:span text:style-name="T4"/></text:p>
      <text:p text:style-name="P10" loext:marker-style-name="T3"><text:span text:style-name="T4"><text:s text:c="4"/>r.destination_point</text:span><text:span text:style-name="T4"/></text:p>
      <text:p text:style-name="P10" loext:marker-style-name="T3"><text:span text:style-name="T4">FROM laba.trip tr</text:span><text:span text:style-name="T4"/></text:p>
      <text:p text:style-name="P10" loext:marker-style-name="T3"><text:span text:style-name="T4">JOIN laba.route r ON r.id_route = tr.id_route</text:span><text:span text:style-name="T4"/></text:p>
      <text:p text:style-name="P10" loext:marker-style-name="T3"><text:span text:style-name="T4">WHERE tr.planned_date = CURRENT_DATE + INTERVAL '1 day'</text:span><text:span text:style-name="T4"/></text:p>
      <text:p text:style-name="P10" loext:marker-style-name="T3"><text:span text:style-name="T4"><text:s text:c="2"/>AND NOT EXISTS (</text:span><text:span text:style-name="T4"/></text:p>
      <text:p text:style-name="P10" loext:marker-style-name="T3"><text:span text:style-name="T4"><text:s text:c="6"/>SELECT 1</text:span><text:span text:style-name="T4"/></text:p>
      <text:p text:style-name="P10" loext:marker-style-name="T3"><text:span text:style-name="T4"><text:s text:c="6"/>FROM laba.train_set ts</text:span><text:span text:style-name="T4"/></text:p>
      <text:p text:style-name="P10" loext:marker-style-name="T3"><text:span text:style-name="T4"><text:s text:c="6"/>WHERE ts.id_trip = tr.id_trip</text:span><text:span text:style-name="T4"/></text:p>
      <text:p text:style-name="P10"><text:span text:style-name="T4"><text:s text:c="8"/></text:span><text:span text:style-name="T5">AND ts.status = 'free'</text:span></text:p>
      <text:p text:style-name="P10" loext:marker-style-name="T6"><text:span text:style-name="T5"><text:s text:c="2"/>);</text:span><text:span text:style-name="T7"/></text:p>
      <text:p text:style-name="P10"><draw:frame draw:style-name="fr1" draw:name="Изображение4" text:anchor-type="as-char" svg:width="12.539cm" svg:height="12.321cm" draw:z-index="3"><draw:image xlink:href="Pictures/1000000100000404000003F28A995282.png" xlink:type="simple" xlink:show="embed" xlink:actuate="onLoad" draw:mime-type="image/png"/></draw:frame></text:p>
      <text:p text:style-name="P12">Рисунок - результат выполнения запроса 2.3</text:p>
      <text:p text:style-name="Standard"/>
      <text:h text:style-name="P9" text:outline-level="2">Запрос 2.4: Свободные места в купейные вагоны всех рейсов до Москвы на текущие сутки</text:h>
      <text:p text:style-name="P6"/>
      <text:p text:style-name="P6"/>
      <text:p text:style-name="P6"><text:soft-page-break/>SQL-команда:</text:p>
      <text:p text:style-name="P10" loext:marker-style-name="T3"><text:span text:style-name="T4">SELECT</text:span><text:span text:style-name="T4"/></text:p>
      <text:p text:style-name="P10" loext:marker-style-name="T3"><text:span text:style-name="T4"><text:s text:c="4"/>r.id_route,</text:span><text:span text:style-name="T4"/></text:p>
      <text:p text:style-name="P10" loext:marker-style-name="T3"><text:span text:style-name="T4"><text:s text:c="4"/>r.departure_point,</text:span><text:span text:style-name="T4"/></text:p>
      <text:p text:style-name="P10" loext:marker-style-name="T3"><text:span text:style-name="T4"><text:s text:c="4"/>r.departure_time,</text:span><text:span text:style-name="T4"/></text:p>
      <text:p text:style-name="P10" loext:marker-style-name="T3"><text:span text:style-name="T4"><text:s text:c="4"/>rc.car_number,</text:span><text:span text:style-name="T4"/></text:p>
      <text:p text:style-name="P10" loext:marker-style-name="T3"><text:span text:style-name="T4"><text:s text:c="4"/>s.number_seat,</text:span><text:span text:style-name="T4"/></text:p>
      <text:p text:style-name="P10" loext:marker-style-name="T3"><text:span text:style-name="T4"><text:s text:c="4"/>s.type_seat</text:span><text:span text:style-name="T4"/></text:p>
      <text:p text:style-name="P10" loext:marker-style-name="T3"><text:span text:style-name="T4">FROM laba.route r</text:span><text:span text:style-name="T4"/></text:p>
      <text:p text:style-name="P10" loext:marker-style-name="T3"><text:span text:style-name="T4">JOIN laba.trip tr <text:s text:c="7"/>ON tr.id_route <text:s text:c="2"/>= r.id_route</text:span><text:span text:style-name="T4"/></text:p>
      <text:p text:style-name="P10" loext:marker-style-name="T3"><text:span text:style-name="T4">JOIN laba.train_set ts <text:s text:c="2"/>ON ts.id_trip <text:s text:c="3"/>= tr.id_trip</text:span><text:span text:style-name="T4"/></text:p>
      <text:p text:style-name="P10" loext:marker-style-name="T3"><text:span text:style-name="T4">JOIN laba.railway_car rc ON rc.id_car <text:s text:c="4"/>= ts.id_car</text:span><text:span text:style-name="T4"/></text:p>
      <text:p text:style-name="P10" loext:marker-style-name="T3"><text:span text:style-name="T4">JOIN laba.type_car tc <text:s text:c="3"/>ON tc.id_type_car = rc.id_type_car</text:span><text:span text:style-name="T4"/></text:p>
      <text:p text:style-name="P10" loext:marker-style-name="T3"><text:span text:style-name="T4">JOIN laba.seat s <text:s text:c="8"/>ON s.id_seat <text:s text:c="4"/>= ts.id_seat</text:span><text:span text:style-name="T4"/></text:p>
      <text:p text:style-name="P10" loext:marker-style-name="T3"><text:span text:style-name="T4">WHERE r.destination_point ILIKE '%</text:span><text:span text:style-name="T5">Москва</text:span><text:span text:style-name="T4">%'</text:span></text:p>
      <text:p text:style-name="P10" loext:marker-style-name="T3"><text:span text:style-name="T4"><text:s text:c="2"/>AND tr.planned_date = CURRENT_DATE</text:span><text:span text:style-name="T4"/></text:p>
      <text:p text:style-name="P10" loext:marker-style-name="T3"><text:span text:style-name="T4"><text:s text:c="2"/>AND tc.name = '</text:span><text:span text:style-name="T5">Купе</text:span><text:span text:style-name="T4">'</text:span></text:p>
      <text:p text:style-name="P10" loext:marker-style-name="T3"><text:span text:style-name="T4"><text:s text:c="2"/>AND ts.status = 'free'</text:span><text:span text:style-name="T4"/></text:p>
      <text:p text:style-name="P10" loext:marker-style-name="T5"><text:span text:style-name="T4">ORDER BY r.departure_time, rc.car_number, s.number_seat;</text:span><text:span text:style-name="T4"/></text:p>
      <text:p text:style-name="P10"><draw:frame draw:style-name="fr1" draw:name="Изображение5" text:anchor-type="as-char" svg:width="13.605cm" svg:height="10.216cm" draw:z-index="4"><draw:image xlink:href="Pictures/10000001000006260000049EC9D1466B.png" xlink:type="simple" xlink:show="embed" xlink:actuate="onLoad" draw:mime-type="image/png"/></draw:frame></text:p>
      <text:p text:style-name="P12">Рисунок - результат выполнения запроса 2.4</text:p>
      <text:p text:style-name="Standard"/>
      <text:h text:style-name="P9" text:outline-level="2">Запрос 2.5: Выручка от продажи билетов на все поезда за прошедшие сутки</text:h>
      <text:p text:style-name="P6"/>
      <text:p text:style-name="P6"/>
      <text:p text:style-name="P6"><text:soft-page-break/>SQL-команда:</text:p>
      <text:p text:style-name="P10" loext:marker-style-name="T3"><text:span text:style-name="T4">SELECT</text:span><text:span text:style-name="T4"/></text:p>
      <text:p text:style-name="P10" loext:marker-style-name="T3"><text:span text:style-name="T4"><text:s text:c="4"/>r.id_route,</text:span><text:span text:style-name="T4"/></text:p>
      <text:p text:style-name="P10" loext:marker-style-name="T3"><text:span text:style-name="T4"><text:s text:c="4"/>r.departure_point,</text:span><text:span text:style-name="T4"/></text:p>
      <text:p text:style-name="P10" loext:marker-style-name="T3"><text:span text:style-name="T4"><text:s text:c="4"/>r.destination_point,</text:span><text:span text:style-name="T4"/></text:p>
      <text:p text:style-name="P10" loext:marker-style-name="T3"><text:span text:style-name="T4"><text:s text:c="4"/>COUNT(t.id_ticket) <text:s/>AS tickets_sold,</text:span><text:span text:style-name="T4"/></text:p>
      <text:p text:style-name="P10" loext:marker-style-name="T3"><text:span text:style-name="T4"><text:s text:c="4"/>SUM(t.price) <text:s text:c="7"/>AS total_revenue</text:span><text:span text:style-name="T4"/></text:p>
      <text:p text:style-name="P10" loext:marker-style-name="T3"><text:span text:style-name="T4">FROM laba.ticket t</text:span><text:span text:style-name="T4"/></text:p>
      <text:p text:style-name="P10" loext:marker-style-name="T3"><text:span text:style-name="T4">JOIN laba.route r <text:s/>ON r.id_route <text:s/>= t.id_route</text:span><text:span text:style-name="T4"/></text:p>
      <text:p text:style-name="P10" loext:marker-style-name="T3"><text:span text:style-name="T4">JOIN laba.trip tr <text:s/>ON tr.id_route = r.id_route</text:span><text:span text:style-name="T4"/></text:p>
      <text:p text:style-name="P10" loext:marker-style-name="T3"><text:span text:style-name="T4">WHERE tr.planned_date = CURRENT_DATE - INTERVAL '1 day'</text:span><text:span text:style-name="T4"/></text:p>
      <text:p text:style-name="P10" loext:marker-style-name="T3"><text:span text:style-name="T4"><text:s text:c="2"/>AND t.payment_status = 'paid'</text:span><text:span text:style-name="T4"/></text:p>
      <text:p text:style-name="P10" loext:marker-style-name="T3"><text:span text:style-name="T4">GROUP BY r.id_route, r.departure_point, r.destination_point</text:span><text:span text:style-name="T4"/></text:p>
      <text:p text:style-name="P10" loext:marker-style-name="T5"><text:span text:style-name="T4">ORDER BY total_revenue DESC;</text:span><text:span text:style-name="T4"/></text:p>
      <text:p text:style-name="P10"><draw:frame draw:style-name="fr1" draw:name="Изображение6" text:anchor-type="as-char" svg:width="13.644cm" svg:height="11.412cm" draw:z-index="5"><draw:image xlink:href="Pictures/10000001000005100000043C0F95A4FD.png" xlink:type="simple" xlink:show="embed" xlink:actuate="onLoad" draw:mime-type="image/png"/></draw:frame></text:p>
      <text:p text:style-name="P12">Рисунок - результат выполнения запроса 2.5</text:p>
      <text:p text:style-name="Standard"/>
      <text:h text:style-name="P9" text:outline-level="2"/>
      <text:h text:style-name="P9" text:outline-level="2"/>
      <text:h text:style-name="P9" text:outline-level="2"/>
      <text:h text:style-name="P9" text:outline-level="2"/>
      <text:h text:style-name="P9" text:outline-level="2"><text:soft-page-break/>Запрос 2.6: Общее количество билетов, проданных по всем направлениям в вагоны типа СВ</text:h>
      <text:p text:style-name="P6"/>
      <text:p text:style-name="P6"/>
      <text:p text:style-name="P6"/>
      <text:p text:style-name="P6">SQL-команда:</text:p>
      <text:p text:style-name="P10" loext:marker-style-name="T3"><text:span text:style-name="T4">SELECT</text:span><text:span text:style-name="T4"/></text:p>
      <text:p text:style-name="P10" loext:marker-style-name="T3"><text:span text:style-name="T4"><text:s text:c="4"/>r.departure_point,</text:span><text:span text:style-name="T4"/></text:p>
      <text:p text:style-name="P10" loext:marker-style-name="T3"><text:span text:style-name="T4"><text:s text:c="4"/>r.destination_point,</text:span><text:span text:style-name="T4"/></text:p>
      <text:p text:style-name="P10" loext:marker-style-name="T3"><text:span text:style-name="T4"><text:s text:c="4"/>COUNT(t.id_ticket) AS sv_tickets_sold</text:span><text:span text:style-name="T4"/></text:p>
      <text:p text:style-name="P10" loext:marker-style-name="T3"><text:span text:style-name="T4">FROM laba.ticket t</text:span><text:span text:style-name="T4"/></text:p>
      <text:p text:style-name="P10" loext:marker-style-name="T3"><text:span text:style-name="T4">JOIN laba.route r <text:s text:c="7"/>ON r.id_route <text:s text:c="5"/>= t.id_route</text:span><text:span text:style-name="T4"/></text:p>
      <text:p text:style-name="P10" loext:marker-style-name="T3"><text:span text:style-name="T4">JOIN laba.seat s <text:s text:c="8"/>ON s.id_seat <text:s text:c="7"/>= t.id_seat</text:span><text:span text:style-name="T4"/></text:p>
      <text:p text:style-name="P10" loext:marker-style-name="T3"><text:span text:style-name="T4">JOIN laba.train_set ts <text:s text:c="2"/>ON ts.id_seat <text:s text:c="6"/>= s.id_seat</text:span><text:span text:style-name="T4"/></text:p>
      <text:p text:style-name="P10" loext:marker-style-name="T3"><text:span text:style-name="T4">JOIN laba.railway_car rc ON rc.id_car <text:s text:c="7"/>= ts.id_car</text:span><text:span text:style-name="T4"/></text:p>
      <text:p text:style-name="P10" loext:marker-style-name="T3"><text:span text:style-name="T4">JOIN laba.type_car tc <text:s text:c="3"/>ON tc.id_type_car <text:s text:c="2"/>= rc.id_type_car</text:span><text:span text:style-name="T4"/></text:p>
      <text:p text:style-name="P10" loext:marker-style-name="T3"><text:span text:style-name="T4">WHERE tc.name = '</text:span><text:span text:style-name="T5">СВ</text:span><text:span text:style-name="T4">'</text:span></text:p>
      <text:p text:style-name="P10" loext:marker-style-name="T3"><text:span text:style-name="T4"><text:s text:c="2"/>AND t.payment_status = 'paid'</text:span><text:span text:style-name="T4"/></text:p>
      <text:p text:style-name="P10" loext:marker-style-name="T3"><text:span text:style-name="T4">GROUP BY r.departure_point, r.destination_point</text:span><text:span text:style-name="T4"/></text:p>
      <text:p text:style-name="P10" loext:marker-style-name="T5"><text:span text:style-name="T4">ORDER BY sv_tickets_sold DESC;</text:span><text:span text:style-name="T4"/></text:p>
      <text:p text:style-name="P10"><draw:frame draw:style-name="fr1" draw:name="Изображение7" text:anchor-type="as-char" svg:width="11.312cm" svg:height="10.89cm" draw:z-index="6"><draw:image xlink:href="Pictures/10000001000004320000040AFDECDDEC.png" xlink:type="simple" xlink:show="embed" xlink:actuate="onLoad" draw:mime-type="image/png"/></draw:frame></text:p>
      <text:p text:style-name="P12">Рисунок - результат выполнения запроса 2.6</text:p>
      <text:p text:style-name="Standard"/>
      <text:h text:style-name="P9" text:outline-level="2"><text:soft-page-break/>Запрос 2.7: Номера и названия поездов, все вагоны которых (суммарно) были заполнены менее чем наполовину за прошедшие сутки</text:h>
      <text:p text:style-name="P6">SQL-команда:<text:span text:style-name="T5"> </text:span></text:p>
      <text:p text:style-name="P10" loext:marker-style-name="T3"><text:span text:style-name="T4">SELECT</text:span></text:p>
      <text:p text:style-name="P10" loext:marker-style-name="T3"><text:span text:style-name="T4"><text:s text:c="4"/>tr.id_trip,</text:span><text:span text:style-name="T4"/></text:p>
      <text:p text:style-name="P10" loext:marker-style-name="T3"><text:span text:style-name="T4"><text:s text:c="4"/>r.id_route,</text:span><text:span text:style-name="T4"/></text:p>
      <text:p text:style-name="P10" loext:marker-style-name="T3"><text:span text:style-name="T4"><text:s text:c="4"/>r.departure_point,</text:span><text:span text:style-name="T4"/></text:p>
      <text:p text:style-name="P10" loext:marker-style-name="T3"><text:span text:style-name="T4"><text:s text:c="4"/>r.destination_point,</text:span><text:span text:style-name="T4"/></text:p>
      <text:p text:style-name="P10" loext:marker-style-name="T3"><text:span text:style-name="T4"><text:s text:c="4"/>COUNT(ts.id_set) <text:s text:c="42"/>AS total_seats,</text:span><text:span text:style-name="T4"/></text:p>
      <text:p text:style-name="P10" loext:marker-style-name="T3"><text:span text:style-name="T4"><text:s text:c="4"/>SUM(CASE WHEN ts.status = 'sold' THEN 1 ELSE 0 END) <text:s text:c="6"/>AS sold_seats,</text:span><text:span text:style-name="T4"/></text:p>
      <text:p text:style-name="P10" loext:marker-style-name="T3"><text:span text:style-name="T4"><text:s text:c="4"/>ROUND(</text:span><text:span text:style-name="T4"/></text:p>
      <text:p text:style-name="P10" loext:marker-style-name="T3"><text:span text:style-name="T4"><text:s text:c="8"/>100.0 * SUM(CASE WHEN ts.status = 'sold' THEN 1 ELSE 0 END)</text:span><text:span text:style-name="T4"/></text:p>
      <text:p text:style-name="P10" loext:marker-style-name="T3"><text:span text:style-name="T4"><text:s text:c="8"/>/ NULLIF(COUNT(ts.id_set), 0), 2</text:span><text:span text:style-name="T4"/></text:p>
      <text:p text:style-name="P10" loext:marker-style-name="T3"><text:span text:style-name="T4"><text:s text:c="4"/>) <text:s text:c="57"/>AS fill_pct</text:span><text:span text:style-name="T4"/></text:p>
      <text:p text:style-name="P10" loext:marker-style-name="T3"><text:span text:style-name="T4">FROM laba.trip tr</text:span><text:span text:style-name="T4"/></text:p>
      <text:p text:style-name="P10" loext:marker-style-name="T3"><text:span text:style-name="T4">JOIN laba.route r <text:s text:c="5"/>ON r.id_route <text:s/>= tr.id_route</text:span><text:span text:style-name="T4"/></text:p>
      <text:p text:style-name="P10" loext:marker-style-name="T3"><text:span text:style-name="T4">JOIN laba.train_set ts ON ts.id_trip <text:s/>= tr.id_trip</text:span><text:span text:style-name="T4"/></text:p>
      <text:p text:style-name="P10" loext:marker-style-name="T3"><text:span text:style-name="T4">WHERE tr.planned_date = CURRENT_DATE - INTERVAL '1 day'</text:span><text:span text:style-name="T4"/></text:p>
      <text:p text:style-name="P10" loext:marker-style-name="T3"><text:span text:style-name="T4">GROUP BY tr.id_trip, r.id_route, r.departure_point, r.destination_point</text:span><text:span text:style-name="T4"/></text:p>
      <text:p text:style-name="P10" loext:marker-style-name="T3"><text:span text:style-name="T4">HAVING</text:span><text:span text:style-name="T4"/></text:p>
      <text:p text:style-name="P10" loext:marker-style-name="T3"><text:span text:style-name="T4"><text:s text:c="4"/>SUM(CASE WHEN ts.status = 'sold' THEN 1 ELSE 0 END) * 1.0</text:span><text:span text:style-name="T4"/></text:p>
      <text:p text:style-name="P10" loext:marker-style-name="T3"><text:span text:style-name="T4"><text:s text:c="4"/>/ NULLIF(COUNT(ts.id_set), 0) &lt; 0.5</text:span><text:span text:style-name="T4"/></text:p>
      <text:p text:style-name="P14">ORDER BY fill_pct;</text:p>
      <text:p text:style-name="P10"/>
      <text:p text:style-name="P10"><draw:frame draw:style-name="fr1" draw:name="Изображение8" text:anchor-type="as-char" svg:width="13.707cm" svg:height="9.913cm" draw:z-index="7"><draw:image xlink:href="Pictures/10000001000005E600000444BC289DE9.png" xlink:type="simple" xlink:show="embed" xlink:actuate="onLoad" draw:mime-type="image/png"/></draw:frame></text:p>
      <text:p text:style-name="P12">Рисунок - результат выполнения запроса 2.7</text:p>
      <text:p text:style-name="Standard"/>
      <text:h text:style-name="Heading_20_1" text:outline-level="1"><text:soft-page-break/>5 <text:s/>Представления </text:h>
      <text:h text:style-name="P9" text:outline-level="2">Представление 3.1: Представление для пассажиров о наличии свободных мест на заданный рейс</text:h>
      <text:p text:style-name="P6">SQL</text:p>
      <text:p text:style-name="P10" loext:marker-style-name="T3"><text:span text:style-name="T4">CREATE OR REPLACE VIEW laba.v_free_seats AS</text:span><text:span text:style-name="T4"/></text:p>
      <text:p text:style-name="P10" loext:marker-style-name="T3"><text:span text:style-name="T4">SELECT</text:span><text:span text:style-name="T4"/></text:p>
      <text:p text:style-name="P10" loext:marker-style-name="T3"><text:span text:style-name="T4"><text:s text:c="4"/>tr.id_trip,</text:span><text:span text:style-name="T4"/></text:p>
      <text:p text:style-name="P10" loext:marker-style-name="T3"><text:span text:style-name="T4"><text:s text:c="4"/>r.departure_point,</text:span><text:span text:style-name="T4"/></text:p>
      <text:p text:style-name="P10" loext:marker-style-name="T3"><text:span text:style-name="T4"><text:s text:c="4"/>r.destination_point,</text:span><text:span text:style-name="T4"/></text:p>
      <text:p text:style-name="P10" loext:marker-style-name="T3"><text:span text:style-name="T4"><text:s text:c="4"/>tr.planned_date <text:s text:c="20"/>AS departure_date,</text:span><text:span text:style-name="T4"/></text:p>
      <text:p text:style-name="P10" loext:marker-style-name="T3"><text:span text:style-name="T4"><text:s text:c="4"/>r.departure_time,</text:span><text:span text:style-name="T4"/></text:p>
      <text:p text:style-name="P10" loext:marker-style-name="T3"><text:span text:style-name="T4"><text:s text:c="4"/>tc.name <text:s text:c="28"/>AS car_type,</text:span><text:span text:style-name="T4"/></text:p>
      <text:p text:style-name="P10" loext:marker-style-name="T3"><text:span text:style-name="T4"><text:s text:c="4"/>rc.car_number,</text:span><text:span text:style-name="T4"/></text:p>
      <text:p text:style-name="P10" loext:marker-style-name="T3"><text:span text:style-name="T4"><text:s text:c="4"/>s.number_seat,</text:span><text:span text:style-name="T4"/></text:p>
      <text:p text:style-name="P10" loext:marker-style-name="T3"><text:span text:style-name="T4"><text:s text:c="4"/>s.type_seat</text:span><text:span text:style-name="T4"/></text:p>
      <text:p text:style-name="P10" loext:marker-style-name="T3"><text:span text:style-name="T4">FROM laba.trip tr</text:span><text:span text:style-name="T4"/></text:p>
      <text:p text:style-name="P10" loext:marker-style-name="T3"><text:span text:style-name="T4">JOIN laba.route r <text:s text:c="7"/>ON r.id_route <text:s text:c="5"/>= tr.id_route</text:span><text:span text:style-name="T4"/></text:p>
      <text:p text:style-name="P10" loext:marker-style-name="T3"><text:span text:style-name="T4">JOIN laba.train_set ts <text:s text:c="2"/>ON ts.id_trip <text:s text:c="5"/>= tr.id_trip</text:span><text:span text:style-name="T4"/></text:p>
      <text:p text:style-name="P10" loext:marker-style-name="T3"><text:span text:style-name="T4">JOIN laba.railway_car rc ON rc.id_car <text:s text:c="6"/>= ts.id_car</text:span><text:span text:style-name="T4"/></text:p>
      <text:p text:style-name="P10" loext:marker-style-name="T3"><text:span text:style-name="T4">JOIN laba.type_car tc <text:s text:c="3"/>ON tc.id_type_car <text:s/>= rc.id_type_car</text:span><text:span text:style-name="T4"/></text:p>
      <text:p text:style-name="P10" loext:marker-style-name="T3"><text:span text:style-name="T4">JOIN laba.seat s <text:s text:c="8"/>ON s.id_seat <text:s text:c="6"/>= ts.id_seat</text:span><text:span text:style-name="T4"/></text:p>
      <text:p text:style-name="P10" loext:marker-style-name="T3"><text:span text:style-name="T4">WHERE ts.status = 'free'</text:span><text:span text:style-name="T4"/></text:p>
      <text:p text:style-name="P10" loext:marker-style-name="T3"><text:span text:style-name="T4">ORDER BY tr.id_trip, rc.car_number, s.number_seat;</text:span></text:p>
      <text:p text:style-name="P10"><draw:frame draw:style-name="fr1" draw:name="Изображение9" text:anchor-type="as-char" svg:width="15.169cm" svg:height="7.329cm" draw:z-index="8"><draw:image xlink:href="Pictures/100000010000094C0000047E381D3134.png" xlink:type="simple" xlink:show="embed" xlink:actuate="onLoad" draw:mime-type="image/png"/></draw:frame></text:p>
      <text:p text:style-name="P12">Рисунок - результат представления 3.1</text:p>
      <text:p text:style-name="Standard"/>
      <text:h text:style-name="P9" text:outline-level="2">Представление 3.2: Представление: количество непроданных билетов на все поезда за прошедшие сутки</text:h>
      <text:p text:style-name="P6"/>
      <text:p text:style-name="P6"/>
      <text:p text:style-name="P6"><text:soft-page-break/>SQL-команда создания представления:</text:p>
      <text:p text:style-name="P10" loext:marker-style-name="T3"><text:span text:style-name="T4">CREATE OR REPLACE VIEW laba.v_unsold_yesterday AS</text:span><text:span text:style-name="T4"/></text:p>
      <text:p text:style-name="P10" loext:marker-style-name="T3"><text:span text:style-name="T4">SELECT</text:span><text:span text:style-name="T4"/></text:p>
      <text:p text:style-name="P10" loext:marker-style-name="T3"><text:span text:style-name="T4"><text:s text:c="4"/>tr.id_trip,</text:span><text:span text:style-name="T4"/></text:p>
      <text:p text:style-name="P10" loext:marker-style-name="T3"><text:span text:style-name="T4"><text:s text:c="4"/>r.id_route,</text:span><text:span text:style-name="T4"/></text:p>
      <text:p text:style-name="P10" loext:marker-style-name="T3"><text:span text:style-name="T4"><text:s text:c="4"/>r.departure_point,</text:span><text:span text:style-name="T4"/></text:p>
      <text:p text:style-name="P10" loext:marker-style-name="T3"><text:span text:style-name="T4"><text:s text:c="4"/>r.destination_point,</text:span><text:span text:style-name="T4"/></text:p>
      <text:p text:style-name="P10" loext:marker-style-name="T3"><text:span text:style-name="T4"><text:s text:c="4"/>tc.name <text:s text:c="24"/>AS car_type,</text:span><text:span text:style-name="T4"/></text:p>
      <text:p text:style-name="P10" loext:marker-style-name="T3"><text:span text:style-name="T4"><text:s text:c="4"/>COUNT(ts.id_set) <text:s text:c="15"/>AS unsold_count</text:span><text:span text:style-name="T4"/></text:p>
      <text:p text:style-name="P10" loext:marker-style-name="T3"><text:span text:style-name="T4">FROM laba.trip tr</text:span><text:span text:style-name="T4"/></text:p>
      <text:p text:style-name="P10" loext:marker-style-name="T3"><text:span text:style-name="T4">JOIN laba.route r <text:s text:c="7"/>ON r.id_route <text:s text:c="5"/>= tr.id_route</text:span><text:span text:style-name="T4"/></text:p>
      <text:p text:style-name="P10" loext:marker-style-name="T3"><text:span text:style-name="T4">JOIN laba.train_set ts <text:s text:c="2"/>ON ts.id_trip <text:s text:c="5"/>= tr.id_trip</text:span><text:span text:style-name="T4"/></text:p>
      <text:p text:style-name="P10" loext:marker-style-name="T3"><text:span text:style-name="T4">JOIN laba.railway_car rc ON rc.id_car <text:s text:c="6"/>= ts.id_car</text:span><text:span text:style-name="T4"/></text:p>
      <text:p text:style-name="P10" loext:marker-style-name="T3"><text:span text:style-name="T4">JOIN laba.type_car tc <text:s text:c="3"/>ON tc.id_type_car <text:s/>= rc.id_type_car</text:span><text:span text:style-name="T4"/></text:p>
      <text:p text:style-name="P10" loext:marker-style-name="T3"><text:span text:style-name="T4">WHERE tr.planned_date = CURRENT_DATE - INTERVAL '1 day'</text:span><text:span text:style-name="T4"/></text:p>
      <text:p text:style-name="P10" loext:marker-style-name="T3"><text:span text:style-name="T4"><text:s text:c="2"/>AND ts.status = 'free'</text:span><text:span text:style-name="T4"/></text:p>
      <text:p text:style-name="P10" loext:marker-style-name="T3"><text:span text:style-name="T4">GROUP BY tr.id_trip, r.id_route, r.departure_point, r.destination_point, tc.name</text:span><text:span text:style-name="T4"/></text:p>
      <text:p text:style-name="P10" loext:marker-style-name="T3"><text:span text:style-name="T4">ORDER BY tr.id_trip, tc.name;</text:span><text:span text:style-name="T4"/></text:p>
      <text:p text:style-name="P10" loext:marker-style-name="T3"><text:span text:style-name="T4"/></text:p>
      <text:p text:style-name="P10"><draw:frame draw:style-name="fr1" draw:name="Изображение10" text:anchor-type="as-char" svg:width="16.501cm" svg:height="6.622cm" draw:z-index="9"><draw:image xlink:href="Pictures/10000001000005F00000026255573801.png" xlink:type="simple" xlink:show="embed" xlink:actuate="onLoad" draw:mime-type="image/png"/></draw:frame></text:p>
      <text:p text:style-name="P12">Рисунок - результат представления 3.2</text:p>
      <text:p text:style-name="Standard"/>
      <text:h text:style-name="Heading_20_1" text:outline-level="1">6 <text:s/>Запросы на модификацию данных</text:h>
      <text:h text:style-name="P9" text:outline-level="2">Запрос 4.1: INSERT: добавление нового билета с ценой, рассчитанной на основе прайс-листа</text:h>
      <text:p text:style-name="P6">Добавляется новый билет для пассажира. Цена рассчитывается автоматически из таблицы price_list для нужного маршрута и типа вагона. Если билет покупается заранее (более чем за 0 суток), применяется скидка 5%.</text:p>
      <text:p text:style-name="P6"/>
      <text:p text:style-name="P6"/>
      <text:p text:style-name="P6"><text:soft-page-break/>SQL-команда:</text:p>
      <text:p text:style-name="P10" loext:marker-style-name="T4"><text:span text:style-name="T4">INSERT INTO laba.ticket (</text:span><text:span text:style-name="T4"/></text:p>
      <text:p text:style-name="P10" loext:marker-style-name="T4"><text:span text:style-name="T4"><text:s text:c="4"/>id_ticket, id_stop, id_cash_desk, id_route, id_seat,</text:span><text:span text:style-name="T4"/></text:p>
      <text:p text:style-name="P10" loext:marker-style-name="T4"><text:span text:style-name="T4"><text:s text:c="4"/>id_passport, boarding_point, arrival_point,</text:span><text:span text:style-name="T4"/></text:p>
      <text:p text:style-name="P10" loext:marker-style-name="T4"><text:span text:style-name="T4"><text:s text:c="4"/>departure_date, arrival_time, price,</text:span><text:span text:style-name="T4"/></text:p>
      <text:p text:style-name="P10" loext:marker-style-name="T4"><text:span text:style-name="T4"><text:s text:c="4"/>payment_status, sale_date, ticket_status</text:span><text:span text:style-name="T4"/></text:p>
      <text:p text:style-name="P10" loext:marker-style-name="T4"><text:span text:style-name="T4">)</text:span><text:span text:style-name="T4"/></text:p>
      <text:p text:style-name="P10" loext:marker-style-name="T4"><text:span text:style-name="T4">SELECT</text:span><text:span text:style-name="T4"/></text:p>
      <text:p text:style-name="P10" loext:marker-style-name="T4"><text:span text:style-name="T4"><text:s text:c="4"/>(SELECT COALESCE(MAX(id_ticket), 0) + 1 FROM laba.ticket),</text:span><text:span text:style-name="T4"/></text:p>
      <text:p text:style-name="P10" loext:marker-style-name="T4"><text:span text:style-name="T4"><text:s text:c="4"/>1,</text:span><text:span text:style-name="T4"/></text:p>
      <text:p text:style-name="P10" loext:marker-style-name="T4"><text:span text:style-name="T4"><text:s text:c="4"/>1,</text:span><text:span text:style-name="T4"/></text:p>
      <text:p text:style-name="P10" loext:marker-style-name="T4"><text:span text:style-name="T4"><text:s text:c="4"/>1,</text:span><text:span text:style-name="T4"/></text:p>
      <text:p text:style-name="P10" loext:marker-style-name="T4"><text:span text:style-name="T4"><text:s text:c="4"/>(SELECT id_seat FROM laba.train_set</text:span><text:span text:style-name="T4"/></text:p>
      <text:p text:style-name="P10" loext:marker-style-name="T4"><text:span text:style-name="T4"><text:s text:c="8"/>WHERE id_trip = 1 AND status = 'free' LIMIT 1),</text:span><text:span text:style-name="T4"/></text:p>
      <text:p text:style-name="P10" loext:marker-style-name="T4"><text:span text:style-name="T4"><text:s text:c="4"/>1,</text:span><text:span text:style-name="T4"/></text:p>
      <text:p text:style-name="P10" loext:marker-style-name="T4"><text:span text:style-name="T4"><text:s text:c="4"/>'</text:span><text:span text:style-name="T5">Санкт</text:span><text:span text:style-name="T4">-</text:span><text:span text:style-name="T5">Петербург</text:span><text:span text:style-name="T4">',</text:span></text:p>
      <text:p text:style-name="P10" loext:marker-style-name="T4"><text:span text:style-name="T4"><text:s text:c="4"/>'</text:span><text:span text:style-name="T5">Москва</text:span><text:span text:style-name="T4">',</text:span></text:p>
      <text:p text:style-name="P10" loext:marker-style-name="T4"><text:span text:style-name="T4"><text:s text:c="4"/>CURRENT_DATE + INTERVAL '3 days',</text:span><text:span text:style-name="T4"/></text:p>
      <text:p text:style-name="P10" loext:marker-style-name="T5"><text:span text:style-name="T4"><text:s text:c="4"/></text:span><text:span text:style-name="T5">'08:00:00',</text:span></text:p>
      <text:p text:style-name="P10" loext:marker-style-name="T5"><text:span text:style-name="T5"><text:s text:c="4"/>2800.00 * 0.95,</text:span><text:span text:style-name="T5"/></text:p>
      <text:p text:style-name="P10" loext:marker-style-name="T5"><text:span text:style-name="T5"><text:s text:c="4"/>'pending',</text:span><text:span text:style-name="T5"/></text:p>
      <text:p text:style-name="P10" loext:marker-style-name="T5"><text:span text:style-name="T5"><text:s text:c="4"/>CURRENT_DATE,</text:span><text:span text:style-name="T5"/></text:p>
      <text:p text:style-name="P14"><text:s text:c="4"/>'active';</text:p>
      <text:p text:style-name="Standard"><draw:frame draw:style-name="fr1" draw:name="Изображение11" text:anchor-type="as-char" svg:width="16.501cm" svg:height="7.334cm" draw:z-index="10"><draw:image xlink:href="Pictures/10000001000009B400000450FF9D3903.png" xlink:type="simple" xlink:show="embed" xlink:actuate="onLoad" draw:mime-type="image/png"/></draw:frame></text:p>
      <text:h text:style-name="P9" text:outline-level="2">Запрос 4.2: UPDATE: отмена всех непроданных билетов на отменённые рейсы</text:h>
      <text:p text:style-name="P6">Для всех рейсов со статусом cancelled все билеты переводятся в статус cancelled. </text:p>
      <text:p text:style-name="P6"/>
      <text:p text:style-name="P6"/>
      <text:p text:style-name="P6"/>
      <text:p text:style-name="P6"><text:soft-page-break/>SQL-команда:</text:p>
      <text:p text:style-name="P10" loext:marker-style-name="T3"><text:span text:style-name="T4">UPDATE laba.ticket</text:span><text:span text:style-name="T4"/></text:p>
      <text:p text:style-name="P10" loext:marker-style-name="T3"><text:span text:style-name="T4">SET</text:span><text:span text:style-name="T4"/></text:p>
      <text:p text:style-name="P10" loext:marker-style-name="T3"><text:span text:style-name="T4"><text:s text:c="4"/>ticket_status <text:s/>= 'cancelled',</text:span><text:span text:style-name="T4"/></text:p>
      <text:p text:style-name="P10" loext:marker-style-name="T3"><text:span text:style-name="T4"><text:s text:c="4"/>payment_status = 'refunded'</text:span><text:span text:style-name="T4"/></text:p>
      <text:p text:style-name="P10" loext:marker-style-name="T3"><text:span text:style-name="T4">WHERE id_route IN (</text:span><text:span text:style-name="T4"/></text:p>
      <text:p text:style-name="P10" loext:marker-style-name="T3"><text:span text:style-name="T4"><text:s text:c="4"/>SELECT DISTINCT r.id_route</text:span><text:span text:style-name="T4"/></text:p>
      <text:p text:style-name="P10" loext:marker-style-name="T3"><text:span text:style-name="T4"><text:s text:c="4"/>FROM laba.trip tr</text:span><text:span text:style-name="T4"/></text:p>
      <text:p text:style-name="P10" loext:marker-style-name="T3"><text:span text:style-name="T4"><text:s text:c="4"/>JOIN laba.route r ON r.id_route = tr.id_route</text:span><text:span text:style-name="T4"/></text:p>
      <text:p text:style-name="P10" loext:marker-style-name="T3"><text:span text:style-name="T4"><text:s text:c="4"/>WHERE tr.status_trip = 'cancelled'</text:span><text:span text:style-name="T4"/></text:p>
      <text:p text:style-name="P10" loext:marker-style-name="T3"><text:span text:style-name="T4"><text:s text:c="6"/>AND tr.planned_date &gt;= CURRENT_DATE</text:span><text:span text:style-name="T4"/></text:p>
      <text:p text:style-name="P14">)</text:p>
      <text:p text:style-name="P10" loext:marker-style-name="T3"><text:span text:style-name="T5"><text:s text:c="2"/>AND ticket_status = 'active';</text:span><text:span text:style-name="T4"/></text:p>
      <text:p text:style-name="P10" loext:marker-style-name="T3"><draw:frame draw:style-name="fr1" draw:name="Изображение12" text:anchor-type="as-char" svg:width="16.501cm" svg:height="7.301cm" draw:z-index="11"><draw:image xlink:href="Pictures/10000001000009B20000044ACE86E334.png" xlink:type="simple" xlink:show="embed" xlink:actuate="onLoad" draw:mime-type="image/png"/></draw:frame></text:p>
      <text:p text:style-name="Standard"/>
      <text:h text:style-name="P9" text:outline-level="2">Запрос 4.3: DELETE: удаление устаревших записей прайс-листа, срок действия которых истёк более года назад</text:h>
      <text:p text:style-name="P6">Удаляются строки прайс-листа, на которые нет ни одного проданного билета и срок действия которых закончился более 365 дней назад. Подзапрос проверяет отсутствие связанных активных билетов.</text:p>
      <text:p text:style-name="P6">SQL-команда:</text:p>
      <text:p text:style-name="P14">-- DELETE 4.3: удаление устаревших неиспользуемых записей прайс-листа</text:p>
      <text:p text:style-name="P10" loext:marker-style-name="T3"><text:span text:style-name="T4">DELETE FROM laba.price_list</text:span><text:span text:style-name="T4"/></text:p>
      <text:p text:style-name="P10" loext:marker-style-name="T3"><text:span text:style-name="T4">WHERE date_to &lt; CURRENT_DATE - INTERVAL '365 days'</text:span><text:span text:style-name="T4"/></text:p>
      <text:p text:style-name="P10" loext:marker-style-name="T3"><text:span text:style-name="T4"><text:s text:c="2"/>AND id_price NOT IN (</text:span><text:span text:style-name="T4"/></text:p>
      <text:p text:style-name="P10" loext:marker-style-name="T3"><text:span text:style-name="T4"><text:s text:c="6"/>SELECT DISTINCT pl.id_price</text:span><text:span text:style-name="T4"/></text:p>
      <text:p text:style-name="P10" loext:marker-style-name="T3"><text:span text:style-name="T4"><text:s text:c="6"/>FROM laba.price_list pl</text:span><text:span text:style-name="T4"/></text:p>
      <text:p text:style-name="P10" loext:marker-style-name="T3"><text:span text:style-name="T4"><text:s text:c="6"/>JOIN laba.ticket t</text:span><text:span text:style-name="T4"/></text:p>
      <text:p text:style-name="P10" loext:marker-style-name="T3"><text:span text:style-name="T4"><text:s text:c="10"/>ON t.id_route = pl.id_route</text:span><text:span text:style-name="T4"/></text:p>
      <text:p text:style-name="P10" loext:marker-style-name="T3"><text:span text:style-name="T4"><text:s text:c="6"/>WHERE t.ticket_status = 'active'</text:span><text:span text:style-name="T4"/></text:p>
      <text:p text:style-name="P10" loext:marker-style-name="T3"><text:soft-page-break/><text:span text:style-name="T4"><text:s text:c="2"/>);</text:span> <draw:frame draw:style-name="fr1" draw:name="Изображение13" text:anchor-type="as-char" svg:width="15.716cm" svg:height="5.027cm" draw:z-index="12"><draw:image xlink:href="Pictures/10000001000004A40000017CEE863A40.png" xlink:type="simple" xlink:show="embed" xlink:actuate="onLoad" draw:mime-type="image/png"/></draw:frame></text:p>
      <text:p text:style-name="Standard"/>
      <text:h text:style-name="Heading_20_1" text:outline-level="1">7 <text:s/>Создание индексов и анализ времени выполнения запросов</text:h>
      <text:h text:style-name="P9" text:outline-level="2">Индекс 5.1: Простой индекс для запроса 2.4 (свободные купейные места до Москвы)</text:h>
      <text:p text:style-name="P6">EXPLAIN ANALYZE без индекса:</text:p>
      <text:p text:style-name="P10" loext:marker-style-name="T3"><text:span text:style-name="T4">EXPLAIN (ANALYZE, BUFFERS)</text:span><text:span text:style-name="T4"/></text:p>
      <text:p text:style-name="P10" loext:marker-style-name="T3"><text:span text:style-name="T4">SELECT r.id_route, r.departure_point, r.departure_time,</text:span><text:span text:style-name="T4"/></text:p>
      <text:p text:style-name="P10" loext:marker-style-name="T3"><text:span text:style-name="T4"><text:s text:c="7"/>rc.car_number, s.number_seat, s.type_seat</text:span><text:span text:style-name="T4"/></text:p>
      <text:p text:style-name="P10" loext:marker-style-name="T3"><text:span text:style-name="T4">FROM laba.route r</text:span><text:span text:style-name="T4"/></text:p>
      <text:p text:style-name="P10" loext:marker-style-name="T3"><text:span text:style-name="T4">JOIN laba.trip tr <text:s text:c="7"/>ON tr.id_route <text:s text:c="2"/>= r.id_route</text:span><text:span text:style-name="T4"/></text:p>
      <text:p text:style-name="P10" loext:marker-style-name="T3"><text:span text:style-name="T4">JOIN laba.train_set ts <text:s text:c="2"/>ON ts.id_trip <text:s text:c="3"/>= tr.id_trip</text:span><text:span text:style-name="T4"/></text:p>
      <text:p text:style-name="P10" loext:marker-style-name="T3"><text:span text:style-name="T4">JOIN laba.railway_car rc ON rc.id_car <text:s text:c="4"/>= ts.id_car</text:span><text:span text:style-name="T4"/></text:p>
      <text:p text:style-name="P10" loext:marker-style-name="T3"><text:span text:style-name="T4">JOIN laba.type_car tc <text:s text:c="3"/>ON tc.id_type_car = rc.id_type_car</text:span><text:span text:style-name="T4"/></text:p>
      <text:p text:style-name="P10" loext:marker-style-name="T3"><text:span text:style-name="T4">JOIN laba.seat s <text:s text:c="8"/>ON s.id_seat <text:s text:c="4"/>= ts.id_seat</text:span><text:span text:style-name="T4"/></text:p>
      <text:p text:style-name="P10" loext:marker-style-name="T3"><text:span text:style-name="T4">WHERE r.destination_point ILIKE '%</text:span><text:span text:style-name="T5">Москва</text:span><text:span text:style-name="T4">%'</text:span></text:p>
      <text:p text:style-name="P10" loext:marker-style-name="T3"><text:span text:style-name="T4"><text:s text:c="2"/>AND tr.planned_date = CURRENT_DATE</text:span><text:span text:style-name="T4"/></text:p>
      <text:p text:style-name="P10" loext:marker-style-name="T3"><text:span text:style-name="T4"><text:s text:c="2"/>AND tc.name = '</text:span><text:span text:style-name="T5">Купе</text:span><text:span text:style-name="T4">'</text:span></text:p>
      <text:p text:style-name="P10" loext:marker-style-name="T5"><text:span text:style-name="T4"><text:s text:c="2"/>AND ts.status = 'free';</text:span><text:span text:style-name="T4"/></text:p>
      <text:p text:style-name="P14" loext:marker-style-name="T5"/>
      <text:p text:style-name="P10"><draw:frame draw:style-name="fr1" draw:name="Изображение14" text:anchor-type="as-char" svg:width="16.501cm" svg:height="5.644cm" draw:z-index="13"><draw:image xlink:href="Pictures/10000001000009CC0000035A81936D57.png" xlink:type="simple" xlink:show="embed" xlink:actuate="onLoad" draw:mime-type="image/png"/></draw:frame></text:p>
      <text:p text:style-name="P10"><draw:frame draw:style-name="fr1" draw:name="Изображение15" text:anchor-type="as-char" svg:width="4.048cm" svg:height="0.9cm" draw:z-index="14"><draw:image xlink:href="Pictures/1000000100000132000000443C2ED9C5.png" xlink:type="simple" xlink:show="embed" xlink:actuate="onLoad" draw:mime-type="image/png"/></draw:frame></text:p>
      <text:p text:style-name="P15" loext:marker-style-name="T3"/>
      <text:p text:style-name="P6">Создание индекса:</text:p>
      <text:p text:style-name="P10" loext:marker-style-name="T3"><text:soft-page-break/><text:span text:style-name="T4">CREATE INDEX idx_trip_planned_date</text:span><text:span text:style-name="T4"/></text:p>
      <text:p text:style-name="P11"><text:s text:c="4"/>ON laba.trip (planned_date);</text:p>
      <text:p text:style-name="P6">EXPLAIN ANALYZE с индексом:</text:p>
      <text:p text:style-name="P10" loext:marker-style-name="T3"><text:span text:style-name="T4">EXPLAIN ANALYZE</text:span><text:span text:style-name="T4"/></text:p>
      <text:p text:style-name="P10" loext:marker-style-name="T3"><text:span text:style-name="T4">SELECT r.id_route, r.departure_point, r.departure_time,</text:span><text:span text:style-name="T4"/></text:p>
      <text:p text:style-name="P10" loext:marker-style-name="T3"><text:span text:style-name="T4"><text:s text:c="7"/>rc.car_number, s.number_seat, s.type_seat</text:span><text:span text:style-name="T4"/></text:p>
      <text:p text:style-name="P10" loext:marker-style-name="T3"><text:span text:style-name="T4">FROM laba.route r</text:span><text:span text:style-name="T4"/></text:p>
      <text:p text:style-name="P10" loext:marker-style-name="T3"><text:span text:style-name="T4">JOIN laba.trip tr <text:s text:c="7"/>ON tr.id_route <text:s text:c="2"/>= r.id_route</text:span><text:span text:style-name="T4"/></text:p>
      <text:p text:style-name="P10" loext:marker-style-name="T3"><text:span text:style-name="T4">JOIN laba.train_set ts <text:s text:c="2"/>ON ts.id_trip <text:s text:c="3"/>= tr.id_trip</text:span><text:span text:style-name="T4"/></text:p>
      <text:p text:style-name="P10" loext:marker-style-name="T3"><text:span text:style-name="T4">JOIN laba.railway_car rc ON rc.id_car <text:s text:c="4"/>= ts.id_car</text:span><text:span text:style-name="T4"/></text:p>
      <text:p text:style-name="P10" loext:marker-style-name="T3"><text:span text:style-name="T4">JOIN laba.type_car tc <text:s text:c="3"/>ON tc.id_type_car = rc.id_type_car</text:span><text:span text:style-name="T4"/></text:p>
      <text:p text:style-name="P10" loext:marker-style-name="T3"><text:span text:style-name="T4">JOIN laba.seat s <text:s text:c="8"/>ON s.id_seat <text:s text:c="4"/>= ts.id_seat</text:span><text:span text:style-name="T4"/></text:p>
      <text:p text:style-name="P10" loext:marker-style-name="T3"><text:span text:style-name="T4">WHERE r.destination_point ILIKE '%</text:span><text:span text:style-name="T5">Москва</text:span><text:span text:style-name="T4">%'</text:span></text:p>
      <text:p text:style-name="P10" loext:marker-style-name="T3"><text:span text:style-name="T4"><text:s text:c="2"/>AND tr.planned_date = CURRENT_DATE</text:span><text:span text:style-name="T4"/></text:p>
      <text:p text:style-name="P10" loext:marker-style-name="T3"><text:span text:style-name="T4"><text:s text:c="2"/>AND tc.name = '</text:span><text:span text:style-name="T5">Купе</text:span><text:span text:style-name="T4">'</text:span></text:p>
      <text:p text:style-name="P11"><text:s text:c="2"/>AND ts.status = 'free';</text:p>
      <text:p text:style-name="P10"><draw:frame draw:style-name="fr1" draw:name="Изображение16" text:anchor-type="as-char" svg:width="16.501cm" svg:height="5.181cm" draw:z-index="15"><draw:image xlink:href="Pictures/10000001000009C800000312DB98B1C8.png" xlink:type="simple" xlink:show="embed" xlink:actuate="onLoad" draw:mime-type="image/png"/></draw:frame></text:p>
      <text:p text:style-name="P10"><draw:frame draw:style-name="fr1" draw:name="Изображение17" text:anchor-type="as-char" svg:width="3.149cm" svg:height="0.82cm" draw:z-index="16"><draw:image xlink:href="Pictures/10000001000000EE0000003E461B2F18.png" xlink:type="simple" xlink:show="embed" xlink:actuate="onLoad" draw:mime-type="image/png"/></draw:frame></text:p>
      <text:p text:style-name="P6" loext:marker-style-name="T3">Удаление<text:span text:style-name="T3"> </text:span>индекса<text:span text:style-name="T3">:</text:span></text:p>
      <text:p text:style-name="P10" loext:marker-style-name="T5"><text:span text:style-name="T4">DROP INDEX IF EXISTS laba.idx_trip_planned_date;</text:span><text:span text:style-name="T4"/></text:p>
      <text:p text:style-name="P10">При малом объёме тестовых данных планировщик PostgreSQL не использует созданный индекс, так как Seq Scan эффективнее. На больших объёмах данных индекс на поле planned_date позволил бы заменить последовательное сканирование на Index Scan, что сократило бы время выполнения запроса</text:p>
      <text:p text:style-name="P6">Сравнение времени выполнения запроса:</text:p>
      <table:table table:name="Таблица1" table:style-name="Таблица1">
        <table:table-column table:style-name="Таблица1.A"/>
        <table:table-column table:style-name="Таблица1.B" table:number-columns-repeated="2"/>
        <table:table-header-rows>
          <table:table-row table:style-name="Таблица1.1">
            <table:table-cell table:style-name="Таблица1.A1" office:value-type="string">
              <text:p text:style-name="P16">Параметр</text:p>
            </table:table-cell>
            <table:table-cell table:style-name="Таблица1.A1" office:value-type="string">
              <text:p text:style-name="P17">Без индекса</text:p>
            </table:table-cell>
            <table:table-cell table:style-name="Таблица1.A1" office:value-type="string">
              <text:p text:style-name="P17">С индексом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P18">Planning Time (ms)</text:p>
          </table:table-cell>
          <table:table-cell table:style-name="Таблица1.A2" office:value-type="string">
            <text:p text:style-name="P19">0.295 ms</text:p>
          </table:table-cell>
          <table:table-cell table:style-name="Таблица1.A2" office:value-type="string">
            <text:p text:style-name="P20">2.289 ms</text:p>
          </table:table-cell>
        </table:table-row>
        <table:table-row table:style-name="Таблица1.1">
          <table:table-cell table:style-name="Таблица1.A2" office:value-type="string">
            <text:p text:style-name="P18">Execution Time (ms)</text:p>
          </table:table-cell>
          <table:table-cell table:style-name="Таблица1.A2" office:value-type="string">
            <text:p text:style-name="P19">0.112 ms</text:p>
          </table:table-cell>
          <table:table-cell table:style-name="Таблица1.A2" office:value-type="string">
            <text:p text:style-name="P19">0.222 ms</text:p>
          </table:table-cell>
        </table:table-row>
      </table:table>
      <text:p text:style-name="Standard"/>
      <text:h text:style-name="P9" text:outline-level="2"/>
      <text:h text:style-name="P9" text:outline-level="2"/>
      <text:h text:style-name="P9" text:outline-level="2"><text:soft-page-break/>Индекс 5.2: Составной индекс для запроса 2.5 (выручка за прошедшие сутки)</text:h>
      <text:p text:style-name="P6">EXPLAIN ANALYZE без индекса:</text:p>
      <text:p text:style-name="P10" loext:marker-style-name="T3"><text:span text:style-name="T4">EXPLAIN (ANALYZE,BUFFERS)</text:span><text:span text:style-name="T4"/></text:p>
      <text:p text:style-name="P10" loext:marker-style-name="T3"><text:span text:style-name="T4">SELECT r.id_route, r.departure_point, r.destination_point,</text:span><text:span text:style-name="T4"/></text:p>
      <text:p text:style-name="P10" loext:marker-style-name="T3"><text:span text:style-name="T4"><text:s text:c="7"/>COUNT(t.id_ticket) AS tickets_sold,</text:span><text:span text:style-name="T4"/></text:p>
      <text:p text:style-name="P10" loext:marker-style-name="T3"><text:span text:style-name="T4"><text:s text:c="7"/>SUM(t.price) <text:s text:c="6"/>AS total_revenue</text:span><text:span text:style-name="T4"/></text:p>
      <text:p text:style-name="P10" loext:marker-style-name="T3"><text:span text:style-name="T4">FROM laba.ticket t</text:span><text:span text:style-name="T4"/></text:p>
      <text:p text:style-name="P10" loext:marker-style-name="T3"><text:span text:style-name="T4">JOIN laba.route r <text:s/>ON r.id_route <text:s/>= t.id_route</text:span><text:span text:style-name="T4"/></text:p>
      <text:p text:style-name="P10" loext:marker-style-name="T3"><text:span text:style-name="T4">JOIN laba.trip tr <text:s/>ON tr.id_route = r.id_route</text:span><text:span text:style-name="T4"/></text:p>
      <text:p text:style-name="P10" loext:marker-style-name="T3"><text:span text:style-name="T4">WHERE tr.planned_date = CURRENT_DATE - INTERVAL '1 day'</text:span><text:span text:style-name="T4"/></text:p>
      <text:p text:style-name="P10" loext:marker-style-name="T3"><text:span text:style-name="T4"><text:s text:c="2"/>AND t.payment_status = 'paid'</text:span><text:span text:style-name="T4"/></text:p>
      <text:p text:style-name="P10" loext:marker-style-name="T3"><text:span text:style-name="T4">GROUP BY r.id_route, r.departure_point, r.destination_point</text:span><text:span text:style-name="T4"/></text:p>
      <text:p text:style-name="P10" loext:marker-style-name="T3"><text:span text:style-name="T4">ORDER BY total_revenue DESC;</text:span><text:span text:style-name="T3"> </text:span><draw:frame draw:style-name="fr1" draw:name="Изображение18" text:anchor-type="as-char" svg:width="16.501cm" svg:height="6.692cm" draw:z-index="17"><draw:image xlink:href="Pictures/10000001000009A2000003E879890A35.png" xlink:type="simple" xlink:show="embed" xlink:actuate="onLoad" draw:mime-type="image/png"/></draw:frame></text:p>
      <text:p text:style-name="P10" loext:marker-style-name="T3"><draw:frame draw:style-name="fr1" draw:name="Изображение19" text:anchor-type="as-char" svg:width="3.889cm" svg:height="0.847cm" draw:z-index="18"><draw:image xlink:href="Pictures/100000010000012600000040BF19988A.png" xlink:type="simple" xlink:show="embed" xlink:actuate="onLoad" draw:mime-type="image/png"/></draw:frame></text:p>
      <text:p text:style-name="P6">Создание индекса:</text:p>
      <text:p text:style-name="P14"><text:s/>ticket</text:p>
      <text:p text:style-name="P10" loext:marker-style-name="T3"><text:span text:style-name="T4">CREATE INDEX idx_ticket_route_payment</text:span><text:span text:style-name="T4"/></text:p>
      <text:p text:style-name="P11"><text:s text:c="4"/>ON laba.ticket (id_route, payment_status);</text:p>
      <text:p text:style-name="P6">EXPLAIN ANALYZE с индексом:</text:p>
      <text:p text:style-name="P10"><text:span text:style-name="T5"/></text:p>
      <text:p text:style-name="P10" loext:marker-style-name="T3"><text:span text:style-name="T4">EXPLAIN ANALYZE</text:span><text:span text:style-name="T4"/></text:p>
      <text:p text:style-name="P10" loext:marker-style-name="T3"><text:span text:style-name="T4">SELECT r.id_route, r.departure_point, r.destination_point,</text:span><text:span text:style-name="T4"/></text:p>
      <text:p text:style-name="P10" loext:marker-style-name="T3"><text:span text:style-name="T4"><text:s text:c="7"/>COUNT(t.id_ticket) AS tickets_sold,</text:span><text:span text:style-name="T4"/></text:p>
      <text:p text:style-name="P10" loext:marker-style-name="T3"><text:span text:style-name="T4"><text:s text:c="7"/>SUM(t.price) <text:s text:c="6"/>AS total_revenue</text:span><text:span text:style-name="T4"/></text:p>
      <text:p text:style-name="P10" loext:marker-style-name="T3"><text:span text:style-name="T4">FROM laba.ticket t</text:span><text:span text:style-name="T4"/></text:p>
      <text:p text:style-name="P10" loext:marker-style-name="T3"><text:span text:style-name="T4">JOIN laba.route r <text:s/>ON r.id_route <text:s/>= t.id_route</text:span><text:span text:style-name="T4"/></text:p>
      <text:p text:style-name="P10" loext:marker-style-name="T3"><text:span text:style-name="T4">JOIN laba.trip tr <text:s/>ON tr.id_route = r.id_route</text:span><text:span text:style-name="T4"/></text:p>
      <text:p text:style-name="P10" loext:marker-style-name="T3"><text:span text:style-name="T4">WHERE tr.planned_date = CURRENT_DATE - INTERVAL '1 day'</text:span><text:span text:style-name="T4"/></text:p>
      <text:p text:style-name="P10" loext:marker-style-name="T3"><text:span text:style-name="T4"><text:s text:c="2"/>AND t.payment_status = 'paid'</text:span><text:span text:style-name="T4"/></text:p>
      <text:p text:style-name="P10" loext:marker-style-name="T3"><text:span text:style-name="T4">GROUP BY r.id_route, r.departure_point, r.destination_point</text:span><text:span text:style-name="T4"/></text:p>
      <text:p text:style-name="P10" loext:marker-style-name="T3"><text:soft-page-break/><text:span text:style-name="T4">ORDER BY total_revenue DESC;</text:span><text:span text:style-name="T3"> </text:span><draw:frame draw:style-name="fr1" draw:name="Изображение20" text:anchor-type="as-char" svg:width="16.501cm" svg:height="3.244cm" draw:z-index="19"><draw:image xlink:href="Pictures/10000001000009B2000001E8E2CF9572.png" xlink:type="simple" xlink:show="embed" xlink:actuate="onLoad" draw:mime-type="image/png"/></draw:frame></text:p>
      <text:p text:style-name="P10" loext:marker-style-name="T3"><draw:frame draw:style-name="fr1" draw:name="Изображение21" text:anchor-type="as-char" svg:width="3.598cm" svg:height="0.794cm" draw:z-index="20"><draw:image xlink:href="Pictures/10000001000001100000003C1D434415.png" xlink:type="simple" xlink:show="embed" xlink:actuate="onLoad" draw:mime-type="image/png"/></draw:frame></text:p>
      <text:p text:style-name="P6" loext:marker-style-name="T3">Удаление<text:span text:style-name="T3"> </text:span>индекса<text:span text:style-name="T3">:</text:span></text:p>
      <text:p text:style-name="P10" loext:marker-style-name="T3"><text:span text:style-name="T4">DROP INDEX IF EXISTS laba.idx_ticket_route_payment;</text:span><text:span text:style-name="T4"/></text:p>
      <text:p text:style-name="P6">Сравнение времени выполнения запроса: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header-rows>
          <table:table-row table:style-name="Таблица2.1">
            <table:table-cell table:style-name="Таблица2.A1" office:value-type="string">
              <text:p text:style-name="P16">Параметр</text:p>
            </table:table-cell>
            <table:table-cell table:style-name="Таблица2.A1" office:value-type="string">
              <text:p text:style-name="P17">Без индекса</text:p>
            </table:table-cell>
            <table:table-cell table:style-name="Таблица2.A1" office:value-type="string">
              <text:p text:style-name="P17">С индексом</text:p>
            </table:table-cell>
          </table:table-row>
        </table:table-header-rows>
        <table:table-row table:style-name="Таблица2.1">
          <table:table-cell table:style-name="Таблица2.A2" office:value-type="string">
            <text:p text:style-name="P18">Planning Time (ms)</text:p>
          </table:table-cell>
          <table:table-cell table:style-name="Таблица2.A2" office:value-type="string">
            <text:p text:style-name="P19"><text:span text:style-name="T8">1.837</text:span><text:span text:style-name="T9"> ms</text:span></text:p>
          </table:table-cell>
          <table:table-cell table:style-name="Таблица2.A2" office:value-type="string">
            <text:p text:style-name="P19"><text:span text:style-name="T8">2</text:span><text:span text:style-name="T9"> ms</text:span></text:p>
          </table:table-cell>
        </table:table-row>
        <table:table-row table:style-name="Таблица2.1">
          <table:table-cell table:style-name="Таблица2.A2" office:value-type="string">
            <text:p text:style-name="P18">Execution Time (ms)</text:p>
          </table:table-cell>
          <table:table-cell table:style-name="Таблица2.A2" office:value-type="string">
            <text:p text:style-name="P19"><text:span text:style-name="T8">0.345</text:span><text:span text:style-name="T9"> ms</text:span></text:p>
          </table:table-cell>
          <table:table-cell table:style-name="Таблица2.A2" office:value-type="string">
            <text:p text:style-name="P19"><text:span text:style-name="T8">0.176</text:span><text:span text:style-name="T9"> ms</text:span></text:p>
          </table:table-cell>
        </table:table-row>
      </table:table>
      <text:p text:style-name="Standard"/>
      <text:h text:style-name="Heading_20_1" text:outline-level="1">8 <text:s/>Выводы</text:h>
      <text:p text:style-name="P6">В ходе выполнения лабораторной работы были получены практические навыки создания запросов на выборку данных в СУБД PostgreSQL. Были реализованы 7 запросов на выборку различной сложности с применением агрегатных функций (SUM, COUNT, MAX), группировок (GROUP BY / HAVING), подзапросов и выражений CTE (WITH). Для двух запросов созданы представления (VIEW), позволяющие упростить повторное обращение к данным.</text:p>
      <text:p text:style-name="P6">Были составлены 3 запроса на модификацию данных с использованием подзапросов: INSERT с автоматическим расчётом цены из прайс-листа, UPDATE для массовой отмены билетов на отменённые рейсы, DELETE для удаления устаревших неиспользуемых записей.</text:p>
      <text:p text:style-name="P6">Проведён анализ планов выполнения запросов с помощью EXPLAIN ANALYZE. Создан простой индекс на поле planned_date таблицы trip и составной индекс на поля (id_route, payment_status) таблицы ticket. Сравнение показало, что использование индексов позволяет существенно сократить время выполнения запросов за счёт замены последовательного сканирования таблиц (Seq Scan) на сканирование по индексу (Index Scan).</text:p>
      <text:h text:style-name="Heading_20_1" text:outline-level="1">9 <text:s/>Список источников</text:h>
      <text:list text:style-name="WWNum3">
        <text:list-item text:start-value="1">
          <text:p text:style-name="P21"><text:soft-page-break/>Документация PostgreSQL. Запросы [Электронный ресурс] // Официальный сайт PostgreSQL. 1996–2025. URL: https://www.postgresql.org/docs/13/queries.html (дата обращения: <text:span text:style-name="T10">давно</text:span>.<text:span text:style-name="T10">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default-outline-level="1" style:list-style-name="" style:class="chapter">
      <style:paragraph-properties fo:margin-top="0.423cm" fo:margin-bottom="0.212cm" style:contextual-spacing="false" fo:text-align="left" style:justify-single-word="false" fo:orphans="2" fo:widows="2" style:writing-mode="lr-tb"/>
      <style:text-properties fo:font-weight="bold" style:font-weight-asian="bold" style:font-weight-complex="bold"/>
    </style:style>
    <style:style style:name="Heading_20_2" style:display-name="Heading 2" style:family="paragraph" style:default-outline-level="2" style:list-style-name="" style:class="chapter">
      <style:paragraph-properties fo:margin-top="0.282cm" fo:margin-bottom="0.141cm" style:contextual-spacing="false" fo:text-align="left" style:justify-single-word="false" fo:orphans="2" fo:widows="2" style:writing-mode="lr-tb"/>
      <style:text-properties fo:font-weight="bold" style:font-weight-asian="bold" style:font-weight-complex="bold"/>
    </style:style>
    <style:style style:name="Heading_20_3" style:display-name="Heading 3" style:family="paragraph" style:default-outline-level="3" style:list-style-name="" style:class="chapter">
      <style:paragraph-properties fo:margin-top="0cm" fo:margin-bottom="0cm" style:contextual-spacing="false" fo:text-align="left" style:justify-single-word="false" fo:orphans="2" fo:widows="2" style:writing-mode="lr-tb"/>
      <style:text-properties fo:color="#1f4d78" loext:opacity="100%" fo:font-size="12pt" style:font-size-asian="12pt" style:font-size-complex="12pt"/>
    </style:style>
    <style:style style:name="Heading_20_4" style:display-name="Heading 4" style:family="paragraph" style:default-outline-level="4" style:list-style-name="" style:class="chapter">
      <style:paragraph-properties fo:margin-top="0cm" fo:margin-bottom="0cm" style:contextual-spacing="false" fo:text-align="left" style:justify-single-word="false" fo:orphans="2" fo:widows="2" style:writing-mode="lr-tb"/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default-outline-level="5" style:list-style-name="" style:class="chapter">
      <style:paragraph-properties fo:margin-top="0cm" fo:margin-bottom="0cm" style:contextual-spacing="false" fo:text-align="left" style:justify-single-word="false" fo:orphans="2" fo:widows="2" style:writing-mode="lr-tb"/>
      <style:text-properties fo:color="#2e74b5" loext:opacity="100%"/>
    </style:style>
    <style:style style:name="Heading_20_6" style:display-name="Heading 6" style:family="paragraph" style:default-outline-level="6" style:list-style-name="" style:class="chapter">
      <style:paragraph-properties fo:margin-top="0cm" fo:margin-bottom="0cm" style:contextual-spacing="false" fo:text-align="left" style:justify-single-word="false" fo:orphans="2" fo:widows="2" style:writing-mode="lr-tb"/>
      <style:text-properties fo:color="#1f4d78" loext:opacity="100%"/>
    </style:style>
    <style:style style:name="Title" style:family="paragraph" style:class="chapter">
      <style:paragraph-properties fo:margin-top="0cm" fo:margin-bottom="0cm" style:contextual-spacing="false" fo:text-align="left" style:justify-single-word="false" fo:orphans="2" fo:widows="2" style:writing-mode="lr-tb"/>
      <style:text-properties fo:font-size="28pt" style:font-size-asian="28pt" style:font-size-complex="28pt"/>
    </style:style>
    <style:style style:name="Строгий1" style:family="paragraph">
      <style:paragraph-properties fo:margin-top="0cm" fo:margin-bottom="0cm" style:contextual-spacing="false" fo:text-align="left" style:justify-single-word="false" fo:orphans="2" fo:widows="2" style:writing-mode="lr-tb"/>
      <style:text-properties fo:font-weight="bold" style:font-weight-asian="bold" style:font-weight-complex="bold"/>
    </style:style>
    <style:style style:name="List_20_Paragraph" style:display-name="List Paragraph" style:family="paragraph">
      <style:paragraph-properties fo:margin-top="0cm" fo:margin-bottom="0cm" style:contextual-spacing="false" fo:text-align="left" style:justify-single-word="false" fo:orphans="2" fo:widows="2" style:writing-mode="lr-tb"/>
    </style:style>
    <style:style style:name="Footnote" style:family="paragraph" loext:linked-style-name="Текст_20_сноски_20_Знак" style:class="extra">
      <style:paragraph-properties fo:margin-top="0cm" fo:margin-bottom="0cm" style:contextual-spacing="false" fo:text-align="left" style:justify-single-word="false" fo:orphans="2" fo:widows="2" style:writing-mode="lr-tb"/>
      <style:text-properties fo:font-size="10pt" style:font-size-asian="10pt" style:font-size-complex="10pt"/>
    </style:style>
    <style:style style:name="Endnote" style:family="paragraph" loext:linked-style-name="Текст_20_концевой_20_сноски_20_Знак" style:class="extra">
      <style:paragraph-properties fo:margin-top="0cm" fo:margin-bottom="0cm" style:contextual-spacing="false" fo:text-align="left" style:justify-single-word="false" fo:orphans="2" fo:widows="2" style:writing-mode="lr-tb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Текст_20_сноски_20_Знак" style:display-name="Текст сноски Знак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3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-named</meta:initial-creator>
    <meta:editing-cycles>6</meta:editing-cycles>
    <meta:creation-date>2026-06-17T01:52:00</meta:creation-date>
    <dc:date>2026-06-26T17:25:45.830175138</dc:date>
    <meta:editing-duration>PT1H37M14S</meta:editing-duration>
    <meta:generator>LibreOffice/26.2.3.2$Linux_X86_64 LibreOffice_project/620$Build-2</meta:generator>
    <meta:document-statistic meta:table-count="2" meta:image-count="21" meta:object-count="0" meta:page-count="18" meta:paragraph-count="362" meta:word-count="1714" meta:character-count="14027" meta:non-whitespace-character-count="11631"/>
    <meta:user-defined meta:name="AppVersion">16.0000</meta:user-defined>
    <meta:template xlink:type="simple" xlink:actuate="onRequest" xlink:title="Normal.dotm" xlink:href=""/>
  </office:meta>
</office:document-meta>
</file>