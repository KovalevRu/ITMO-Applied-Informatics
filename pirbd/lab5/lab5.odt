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C000001521CA1B6B4.png" manifest:media-type="image/png"/>
  <manifest:file-entry manifest:full-path="Pictures/10000001000000CB0000004009AEA7B3.png" manifest:media-type="image/png"/>
  <manifest:file-entry manifest:full-path="Pictures/10000001000001D400000043E305EF0D.png" manifest:media-type="image/png"/>
  <manifest:file-entry manifest:full-path="Pictures/100000010000039F00000092FE689C32.png" manifest:media-type="image/png"/>
  <manifest:file-entry manifest:full-path="Pictures/100000010000038500000105868AF929.png" manifest:media-type="image/png"/>
  <manifest:file-entry manifest:full-path="Pictures/10000001000000B50000002B126F36A8.png" manifest:media-type="image/png"/>
  <manifest:file-entry manifest:full-path="Pictures/10000001000003410000011BD9745E15.png" manifest:media-type="image/png"/>
  <manifest:file-entry manifest:full-path="Pictures/10000001000003410000011CFF27D4E7.png" manifest:media-type="image/png"/>
  <manifest:file-entry manifest:full-path="Pictures/10000001000000C20000003132A6AAE3.png" manifest:media-type="image/png"/>
  <manifest:file-entry manifest:full-path="Pictures/100000010000031B000000A8D3B90B8A.png" manifest:media-type="image/png"/>
  <manifest:file-entry manifest:full-path="Pictures/10000001000000DD00000045D9A3F687.png" manifest:media-type="image/png"/>
  <manifest:file-entry manifest:full-path="Pictures/100000010000047B000000A73C729FBE.png" manifest:media-type="image/png"/>
  <manifest:file-entry manifest:full-path="Pictures/10000001000002E9000001C0FCA101E4.png" manifest:media-type="image/png"/>
  <manifest:file-entry manifest:full-path="Pictures/1000000100000088000000230E147837.png" manifest:media-type="image/png"/>
  <manifest:file-entry manifest:full-path="Pictures/10000001000000ED0000004023D783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353cm" fo:margin-bottom="0.212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212cm" style:contextual-spacing="false" fo:text-align="right" style:justify-single-word="false"/>
    </style:style>
    <style:style style:name="P6" style:family="paragraph" style:parent-style-name="Heading_20_1">
      <style:paragraph-properties fo:margin-top="0cm" fo:margin-bottom="0.212cm" style:contextual-spacing="false" fo:break-before="page"/>
    </style:style>
    <style:style style:name="P7" style:family="paragraph" style:parent-style-name="Standard">
      <style:paragraph-properties fo:margin-top="0cm" fo:margin-bottom="0.212cm" style:contextual-spacing="false" fo:line-height="115%" fo:text-align="justify" style:justify-single-word="false" fo:text-indent="1.27cm" style:auto-text-indent="false" loext:word-spacing-minimum="75%" loext:word-spacing-maximum="133%"/>
    </style:style>
    <style:style style:name="P8" style:family="paragraph" style:parent-style-name="List_20_Paragraph" style:list-style-name="WWNum2">
      <style:paragraph-properties fo:margin-top="0cm" fo:margin-bottom="0.141cm" style:contextual-spacing="false"/>
    </style:style>
    <style:style style:name="P9" style:family="paragraph" style:parent-style-name="Standard">
      <style:paragraph-properties fo:margin-left="1.249cm" fo:margin-top="0cm" fo:margin-bottom="0.071cm" style:contextual-spacing="false"/>
    </style:style>
    <style:style style:name="P10" style:family="paragraph" style:parent-style-name="Standard">
      <style:paragraph-properties fo:margin-left="1.249cm" fo:margin-top="0cm" fo:margin-bottom="0.071cm" style:contextual-spacing="false"/>
      <style:text-properties style:font-name="Courier New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left="1.249cm" fo:margin-top="0cm" fo:margin-bottom="0.071cm" style:contextual-spacing="false"/>
      <style:text-properties fo:language="en" fo:country="US"/>
    </style:style>
    <style:style style:name="P12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13" style:family="paragraph" style:parent-style-name="Standard">
      <style:paragraph-properties fo:margin-top="0.141cm" fo:margin-bottom="0.141cm" style:contextual-spacing="false"/>
    </style:style>
    <style:style style:name="P14" style:family="paragraph" style:parent-style-name="Standard">
      <style:paragraph-properties fo:margin-top="0cm" fo:margin-bottom="0.071cm" style:contextual-spacing="false"/>
    </style:style>
    <style:style style:name="P15" style:family="paragraph" style:parent-style-name="Standard">
      <style:paragraph-properties fo:margin-top="0cm" fo:margin-bottom="0.071cm" style:contextual-spacing="false"/>
      <style:text-properties style:font-name="Courier New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top="0cm" fo:margin-bottom="0.071cm" style:contextual-spacing="false"/>
      <style:text-properties fo:language="en" fo:country="US"/>
    </style:style>
    <style:style style:name="P17" style:family="paragraph" style:parent-style-name="Standard">
      <style:paragraph-properties fo:margin-left="1.228cm" fo:margin-top="0cm" fo:margin-bottom="0.212cm" style:contextual-spacing="false" fo:line-height="115%" fo:text-align="justify" style:justify-single-word="false" fo:text-indent="1.27cm" style:auto-text-indent="false" loext:word-spacing-minimum="75%" loext:word-spacing-maximum="133%"/>
    </style:style>
    <style:style style:name="P18" style:family="paragraph" style:parent-style-name="List_20_Paragraph" style:list-style-name="WWNum3">
      <style:paragraph-properties fo:margin-top="0cm" fo:margin-bottom="0.141cm" style:contextual-spacing="false"/>
    </style:style>
    <style:style style:name="P19" style:family="paragraph" style:parent-style-name="List_20_Paragraph" style:list-style-name="WWNum3">
      <style:paragraph-properties fo:margin-top="0cm" fo:margin-bottom="0.141cm" style:contextual-spacing="false"/>
      <style:text-properties officeooo:paragraph-rsid="00111468"/>
    </style:style>
    <style:style style:name="T1" style:family="text">
      <style:text-properties officeooo:rsid="000fad7f"/>
    </style:style>
    <style:style style:name="T2" style:family="text">
      <style:text-properties fo:language="en" fo:country="US"/>
    </style:style>
    <style:style style:name="T3" style:family="text">
      <style:text-properties style:font-name="Courier New" fo:font-size="10pt" fo:language="en" fo:country="US" style:font-name-asian="Courier New1" style:font-size-asian="10pt" style:font-name-complex="Courier New1" style:font-size-complex="10pt"/>
    </style:style>
    <style:style style:name="T4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color="#888888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officeooo:rsid="001114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3">САНКТ-ПЕТЕРБУРГСКИЙ ГОСУДАРСТВЕННЫЙ УНИВЕРСИТЕТ ИТМО</text:p>
      <text:p text:style-name="Standard"/>
      <text:p text:style-name="Standard"/>
      <text:p text:style-name="Standard"/>
      <text:p text:style-name="P4">ОТЧЁТ</text:p>
      <text:p text:style-name="P4">по лабораторной работе №5</text:p>
      <text:p text:style-name="P4">Процедуры, функции, триггеры в PostgreSQL</text:p>
      <text:p text:style-name="Standard"/>
      <text:p text:style-name="Standard"/>
      <text:p text:style-name="Standard"/>
      <text:p text:style-name="P5">Выполнил:<text:tab/><text:span text:style-name="T1">Ковалев Руслан Бабекович</text:span></text:p>
      <text:p text:style-name="P5">Группа:<text:tab/>K3242</text:p>
      <text:p text:style-name="Standard"/>
      <text:p text:style-name="Standard"/>
      <text:p text:style-name="Standard"/>
      <text:p text:style-name="P2">Санкт-Петербург,2026</text:p>
      <text:p text:style-name="Standard"/>
      <text:h text:style-name="P6" text:outline-level="1">1 <text:s/>Цель работы</text:h>
      <text:p text:style-name="P7">Овладеть практическими навыками создания и использования процедур, функций и триггеров в базе данных PostgreSQL.</text:p>
      <text:h text:style-name="Heading_20_1" text:outline-level="1">2 <text:s/>Практическое задание</text:h>
      <text:p text:style-name="P7">В соответствии с вариантом 6 (база данных Пассажир) выполнить:</text:p>
      <text:list text:style-name="WWNum2">
        <text:list-item text:start-value="1">
          <text:p text:style-name="P8">создать 3 хранимые процедуры согласно индивидуальному заданию (часть 4 ЛР 2);</text:p>
        </text:list-item>
        <text:list-item>
          <text:p text:style-name="P8">создать 5 оригинальных триггеров для базы данных «Пассажир» (Вариант 2.2).</text:p>
        </text:list-item>
      </text:list>
      <text:h text:style-name="Heading_20_1" text:outline-level="1">3 <text:s/>Выполнение</text:h>
      <text:p text:style-name="P7">Все скрипты выполняются в среде SQL Shell (psql) с подключением к базе данных lab1. Перед выполнением осуществляется подключение командой \c lab1.</text:p>
      <text:h text:style-name="Heading_20_2" text:outline-level="2">3.1 <text:s/>Хранимые процедуры</text:h>
      <text:h text:style-name="Heading_20_3" text:outline-level="3">Процедура 1: Повышение цен на билеты в пригородные поезда на 20%</text:h>
      <text:p text:style-name="P7">Процедура обновляет цены активных билетов на пригородные маршруты. Пригородными считаются маршруты с длительностью поездки менее 3 часов. Процедура не принимает параметров и повышает цену ровно на 20%</text:p>
      <text:p text:style-name="P7">Скрипт создания процедуры:</text:p>
      <text:p text:style-name="P9" loext:marker-style-name="T2"><text:span text:style-name="T3">CREATE OR REPLACE PROCEDURE laba.sp_increase_suburban_prices()</text:span><text:span text:style-name="T3"/></text:p>
      <text:p text:style-name="P9" loext:marker-style-name="T2"><text:span text:style-name="T3">LANGUAGE plpgsql</text:span><text:span text:style-name="T3"/></text:p>
      <text:p text:style-name="P9" loext:marker-style-name="T2"><text:span text:style-name="T3">AS $$</text:span><text:span text:style-name="T3"/></text:p>
      <text:p text:style-name="P9" loext:marker-style-name="T2"><text:span text:style-name="T3">DECLARE</text:span><text:span text:style-name="T3"/></text:p>
      <text:p text:style-name="P9" loext:marker-style-name="T2"><text:span text:style-name="T3"><text:s text:c="4"/>v_count INTEGER := 0;</text:span><text:span text:style-name="T3"/></text:p>
      <text:p text:style-name="P10">BEGIN</text:p>
      <text:p text:style-name="P10"><text:s text:c="4"/>UPDATE laba.price_list pl</text:p>
      <text:p text:style-name="P10"><text:s text:c="4"/>SET date_to = pl.date_to <text:s/></text:p>
      <text:p text:style-name="P9" loext:marker-style-name="T2"><text:span text:style-name="T4"><text:s text:c="4"/></text:span><text:span text:style-name="T3">WHERE pl.id_route IN (</text:span></text:p>
      <text:p text:style-name="P9" loext:marker-style-name="T2"><text:span text:style-name="T3"><text:s text:c="8"/>SELECT r.id_route</text:span><text:span text:style-name="T3"/></text:p>
      <text:p text:style-name="P9" loext:marker-style-name="T2"><text:span text:style-name="T3"><text:s text:c="8"/>FROM laba.route r</text:span><text:span text:style-name="T3"/></text:p>
      <text:p text:style-name="P9" loext:marker-style-name="T2"><text:span text:style-name="T3"><text:s text:c="8"/>WHERE (r.arrival_time - r.departure_time) &lt; INTERVAL '3 hours'</text:span><text:span text:style-name="T3"/></text:p>
      <text:p text:style-name="P9"><text:span text:style-name="T3"><text:s text:c="4"/></text:span><text:span text:style-name="T4">);</text:span></text:p>
      <text:p text:style-name="P9"/>
      <text:p text:style-name="P10"><text:s/></text:p>
      <text:p text:style-name="P9" loext:marker-style-name="T2"><text:span text:style-name="T4"><text:s text:c="4"/></text:span><text:span text:style-name="T3">UPDATE laba.ticket t</text:span></text:p>
      <text:p text:style-name="P9" loext:marker-style-name="T2"><text:span text:style-name="T3"><text:s text:c="4"/>SET price = ROUND(t.price * 1.20, 2)</text:span><text:span text:style-name="T3"/></text:p>
      <text:p text:style-name="P9" loext:marker-style-name="T2"><text:span text:style-name="T3"><text:s text:c="4"/>WHERE t.ticket_status = 'active'</text:span><text:span text:style-name="T3"/></text:p>
      <text:p text:style-name="P9" loext:marker-style-name="T2"><text:span text:style-name="T3"><text:s text:c="6"/>AND t.departure_date &gt;= CURRENT_DATE</text:span><text:span text:style-name="T3"/></text:p>
      <text:p text:style-name="P9" loext:marker-style-name="T2"><text:soft-page-break/><text:span text:style-name="T3"><text:s text:c="6"/>AND t.id_route IN (</text:span><text:span text:style-name="T3"/></text:p>
      <text:p text:style-name="P9" loext:marker-style-name="T2"><text:span text:style-name="T3"><text:s text:c="10"/>SELECT r.id_route</text:span><text:span text:style-name="T3"/></text:p>
      <text:p text:style-name="P9" loext:marker-style-name="T2"><text:span text:style-name="T3"><text:s text:c="10"/>FROM laba.route r</text:span><text:span text:style-name="T3"/></text:p>
      <text:p text:style-name="P9" loext:marker-style-name="T2"><text:span text:style-name="T3"><text:s text:c="10"/>WHERE (r.arrival_time - r.departure_time) &lt; INTERVAL '3 hours'</text:span><text:span text:style-name="T3"/></text:p>
      <text:p text:style-name="P9" loext:marker-style-name="T2"><text:span text:style-name="T3"><text:s text:c="6"/>);</text:span><text:span text:style-name="T3"/></text:p>
      <text:p text:style-name="P11" loext:marker-style-name="T2"/>
      <text:p text:style-name="P9" loext:marker-style-name="T2"><text:span text:style-name="T3"><text:s text:c="4"/>GET DIAGNOSTICS v_count = ROW_COUNT;</text:span><text:span text:style-name="T3"/></text:p>
      <text:p text:style-name="P9"><text:span text:style-name="T3"><text:s text:c="4"/></text:span><text:span text:style-name="T4">RAISE NOTICE 'Обновлено билетов на пригородные маршруты: %', v_count;</text:span></text:p>
      <text:p text:style-name="P9" loext:marker-style-name="T2"><text:span text:style-name="T3">END;</text:span><text:span text:style-name="T3"/></text:p>
      <text:p text:style-name="P9" loext:marker-style-name="T2"><text:span text:style-name="T3">$$;</text:span><text:span text:style-name="T3"/></text:p>
      <text:p text:style-name="P11" loext:marker-style-name="T2"/>
      <text:p text:style-name="P9" loext:marker-style-name="T2"><text:span text:style-name="T3"/></text:p>
      <text:p text:style-name="P12" loext:marker-style-name="T2"><draw:frame draw:style-name="fr1" draw:name="Изображение1" text:anchor-type="char" svg:width="12.381cm" svg:height="1.773cm" draw:z-index="0"><draw:image xlink:href="Pictures/10000001000001D400000043E305EF0D.png" xlink:type="simple" xlink:show="embed" xlink:actuate="onLoad" draw:mime-type="image/png"/></draw:frame></text:p>
      <text:p text:style-name="P7">Тестирование процедуры:</text:p>
      <text:p text:style-name="P13" loext:marker-style-name="T3"><text:span text:style-name="T3">INSERT INTO laba.route (id_route, inn, departure_point, destination_point, departure_time, arrival_time)</text:span><text:span text:style-name="T3"/></text:p>
      <text:p text:style-name="P13" loext:marker-style-name="T4"><text:span text:style-name="T4">VALUES (5, 1005, 'Санкт-Петербург', 'Пушкин', '09:00:00', '10:00:00');</text:span><text:span text:style-name="T4"/></text:p>
      <text:p text:style-name="P13" loext:marker-style-name="T4"><text:span text:style-name="T4"> </text:span><text:span text:style-name="T4"/></text:p>
      <text:p text:style-name="P13" loext:marker-style-name="T4"><text:span text:style-name="T4"/></text:p>
      <text:p text:style-name="P13" loext:marker-style-name="T3"><text:span text:style-name="T3">INSERT INTO laba.trip (id_trip, id_route, status_trip, planned_date, planned_arrival_date)</text:span><text:span text:style-name="T3"/></text:p>
      <text:p text:style-name="P13" loext:marker-style-name="T3"><text:span text:style-name="T3">VALUES (10, 5, 'scheduled', CURRENT_DATE + 1, CURRENT_DATE + 1);</text:span><text:span text:style-name="T3"/></text:p>
      <text:p text:style-name="P13" loext:marker-style-name="T3"><text:span text:style-name="T3"> </text:span><text:span text:style-name="T3"/></text:p>
      <text:p text:style-name="P13" loext:marker-style-name="T4"><text:span text:style-name="T4"/></text:p>
      <text:p text:style-name="P13" loext:marker-style-name="T3"><text:span text:style-name="T3">INSERT INTO laba.ticket (</text:span><text:span text:style-name="T3"/></text:p>
      <text:p text:style-name="P13" loext:marker-style-name="T3"><text:span text:style-name="T3">id_ticket, id_stop, id_cash_desk, id_route, id_seat,</text:span><text:span text:style-name="T3"/></text:p>
      <text:p text:style-name="P13" loext:marker-style-name="T3"><text:span text:style-name="T3">id_passport, boarding_point, arrival_point,</text:span><text:span text:style-name="T3"/></text:p>
      <text:p text:style-name="P13" loext:marker-style-name="T3"><text:span text:style-name="T3">departure_date, arrival_time, price,</text:span><text:span text:style-name="T3"/></text:p>
      <text:p text:style-name="P13" loext:marker-style-name="T3"><text:span text:style-name="T3">payment_status, sale_date, ticket_status</text:span><text:span text:style-name="T3"/></text:p>
      <text:p text:style-name="P13" loext:marker-style-name="T3"><text:span text:style-name="T3">) VALUES (</text:span><text:span text:style-name="T3"/></text:p>
      <text:p text:style-name="P13" loext:marker-style-name="T3"><text:span text:style-name="T3">200, 1, 1, 5, 1, 1, '</text:span><text:span text:style-name="T4">Санкт</text:span><text:span text:style-name="T3">-</text:span><text:span text:style-name="T4">Петербург</text:span><text:span text:style-name="T3">', '</text:span><text:span text:style-name="T4">Пушкин</text:span><text:span text:style-name="T3">',</text:span></text:p>
      <text:p text:style-name="P13" loext:marker-style-name="T3"><text:span text:style-name="T3">CURRENT_DATE + 1, '10:00:00', 200.00,</text:span><text:span text:style-name="T3"/></text:p>
      <text:p text:style-name="P13" loext:marker-style-name="T3"><text:span text:style-name="T3">'paid', CURRENT_DATE, 'active'</text:span><text:span text:style-name="T3"/></text:p>
      <text:p text:style-name="P13" loext:marker-style-name="T3"><text:span text:style-name="T3">);</text:span><text:span text:style-name="T3"/></text:p>
      <text:p text:style-name="P13" loext:marker-style-name="T3"><text:span text:style-name="T3"> </text:span><text:span text:style-name="T3"/></text:p>
      <text:p text:style-name="P13" loext:marker-style-name="T3"><text:span text:style-name="T4"/></text:p>
      <text:p text:style-name="P13" loext:marker-style-name="T3"><text:span text:style-name="T3">SELECT id_ticket, id_route, price, ticket_status FROM laba.ticket WHERE id_ticket = 200;</text:span><text:span text:style-name="T3"/></text:p>
      <text:p text:style-name="P13" loext:marker-style-name="T3"><text:span text:style-name="T3"> </text:span><text:span text:style-name="T3"/></text:p>
      <text:p text:style-name="P13" loext:marker-style-name="T4"><text:span text:style-name="T4"/></text:p>
      <text:p text:style-name="P13" loext:marker-style-name="T3"><text:span text:style-name="T3">CALL laba.sp_increase_suburban_prices();</text:span><text:span text:style-name="T3"/></text:p>
      <text:p text:style-name="P13" loext:marker-style-name="T3"><text:span text:style-name="T3"> </text:span><text:span text:style-name="T3"/></text:p>
      <text:p text:style-name="P13" loext:marker-style-name="T4"><text:span text:style-name="T4"/></text:p>
      <text:p text:style-name="P13" loext:marker-style-name="T3"><text:soft-page-break/><text:span text:style-name="T3">SELECT id_ticket, id_route, price, ticket_status FROM laba.ticket WHERE id_ticket = 200;</text:span><text:span text:style-name="T3"/></text:p>
      <text:p text:style-name="Standard" loext:marker-style-name="T2"><draw:frame draw:style-name="fr2" draw:name="Изображение2" text:anchor-type="char" svg:width="16.501cm" svg:height="4.778cm" draw:z-index="1"><draw:image xlink:href="Pictures/100000010000038500000105868AF929.png" xlink:type="simple" xlink:show="embed" xlink:actuate="onLoad" draw:mime-type="image/png"/></draw:frame></text:p>
      <text:h text:style-name="Heading_20_3" text:outline-level="3">Процедура 2: Создание нового рейса</text:h>
      <text:p text:style-name="P7">создаёт новый рейс для существующего маршрута. Принимает три параметра: идентификатор маршрута, дату отправления и дату прибытия. Содержит проверку существования маршрута и корректности дат.</text:p>
      <text:p text:style-name="P7">Скрипт создания процедуры:</text:p>
      <text:p text:style-name="P14"><text:span text:style-name="T4"/></text:p>
      <text:p text:style-name="P14"/>
      <text:p text:style-name="P14" loext:marker-style-name="T2"><text:span text:style-name="T3">CREATE OR REPLACE PROCEDURE laba.sp_create_trip(</text:span><text:span text:style-name="T3"/></text:p>
      <text:p text:style-name="P14" loext:marker-style-name="T2"><text:span text:style-name="T3"><text:s text:c="4"/>p_id_route <text:s text:c="6"/>INTEGER,</text:span><text:span text:style-name="T3"/></text:p>
      <text:p text:style-name="P14" loext:marker-style-name="T2"><text:span text:style-name="T3"><text:s text:c="4"/>p_planned_date <text:s text:c="2"/>DATE,</text:span><text:span text:style-name="T3"/></text:p>
      <text:p text:style-name="P14" loext:marker-style-name="T2"><text:span text:style-name="T3"><text:s text:c="4"/>p_arrival_date <text:s text:c="2"/>DATE</text:span><text:span text:style-name="T3"/></text:p>
      <text:p text:style-name="P14" loext:marker-style-name="T2"><text:span text:style-name="T3">)</text:span><text:span text:style-name="T3"/></text:p>
      <text:p text:style-name="P14" loext:marker-style-name="T2"><text:span text:style-name="T3">LANGUAGE plpgsql</text:span><text:span text:style-name="T3"/></text:p>
      <text:p text:style-name="P14" loext:marker-style-name="T2"><text:span text:style-name="T3">AS $$</text:span><text:span text:style-name="T3"/></text:p>
      <text:p text:style-name="P14" loext:marker-style-name="T2"><text:span text:style-name="T3">DECLARE</text:span><text:span text:style-name="T3"/></text:p>
      <text:p text:style-name="P14" loext:marker-style-name="T2"><text:span text:style-name="T3"><text:s text:c="4"/>v_new_id <text:s/>INTEGER;</text:span><text:span text:style-name="T3"/></text:p>
      <text:p text:style-name="P14"><text:span text:style-name="T3"><text:s text:c="4"/></text:span><text:span text:style-name="T4">v_exists <text:s/>INTEGER;</text:span></text:p>
      <text:p text:style-name="P15">BEGIN</text:p>
      <text:p text:style-name="P14"><text:span text:style-name="T4"/></text:p>
      <text:p text:style-name="P14" loext:marker-style-name="T2"><text:span text:style-name="T4"><text:s text:c="4"/></text:span><text:span text:style-name="T3">SELECT COUNT(*) INTO v_exists</text:span></text:p>
      <text:p text:style-name="P14" loext:marker-style-name="T2"><text:span text:style-name="T3"><text:s text:c="4"/>FROM laba.route WHERE id_route = p_id_route;</text:span><text:span text:style-name="T3"/></text:p>
      <text:p text:style-name="P16" loext:marker-style-name="T2"/>
      <text:p text:style-name="P14" loext:marker-style-name="T2"><text:span text:style-name="T3"><text:s text:c="4"/>IF v_exists = 0 THEN</text:span><text:span text:style-name="T3"/></text:p>
      <text:p text:style-name="P14" loext:marker-style-name="T2"><text:span text:style-name="T3"><text:s text:c="8"/>RAISE EXCEPTION '</text:span><text:span text:style-name="T4">Маршрут</text:span><text:span text:style-name="T3"> </text:span><text:span text:style-name="T4">с</text:span><text:span text:style-name="T3"> id=% </text:span><text:span text:style-name="T4">не</text:span><text:span text:style-name="T3"> </text:span><text:span text:style-name="T4">найден</text:span><text:span text:style-name="T3">', p_id_route;</text:span></text:p>
      <text:p text:style-name="P14" loext:marker-style-name="T2"><text:span text:style-name="T3"><text:s text:c="4"/>END IF;</text:span><text:span text:style-name="T3"/></text:p>
      <text:p text:style-name="P16" loext:marker-style-name="T2"/>
      <text:p text:style-name="P14" loext:marker-style-name="T2"><text:span text:style-name="T4"/></text:p>
      <text:p text:style-name="P14" loext:marker-style-name="T2"><text:span text:style-name="T3"><text:s text:c="4"/>IF p_arrival_date &lt;= p_planned_date THEN</text:span><text:span text:style-name="T3"/></text:p>
      <text:p text:style-name="P14"><text:span text:style-name="T3"><text:s text:c="8"/></text:span><text:span text:style-name="T4">RAISE EXCEPTION 'Дата прибытия должна быть позже даты отправления';</text:span></text:p>
      <text:p text:style-name="P15"><text:s text:c="4"/>END IF;</text:p>
      <text:p text:style-name="P14"/>
      <text:p text:style-name="P14"><text:span text:style-name="T4"/></text:p>
      <text:p text:style-name="P14" loext:marker-style-name="T2"><text:span text:style-name="T4"><text:s text:c="4"/></text:span><text:span text:style-name="T3">SELECT COALESCE(MAX(id_trip), 0) + 1 INTO v_new_id FROM laba.trip;</text:span></text:p>
      <text:p text:style-name="P16" loext:marker-style-name="T2"><text:soft-page-break/></text:p>
      <text:p text:style-name="P14" loext:marker-style-name="T2"><text:span text:style-name="T4"/></text:p>
      <text:p text:style-name="P14" loext:marker-style-name="T2"><text:span text:style-name="T3"><text:s text:c="4"/>INSERT INTO laba.trip (</text:span><text:span text:style-name="T3"/></text:p>
      <text:p text:style-name="P14" loext:marker-style-name="T2"><text:span text:style-name="T3"><text:s text:c="8"/>id_trip, id_route, status_trip,</text:span><text:span text:style-name="T3"/></text:p>
      <text:p text:style-name="P14" loext:marker-style-name="T2"><text:span text:style-name="T3"><text:s text:c="8"/>planned_date, planned_arrival_date</text:span><text:span text:style-name="T3"/></text:p>
      <text:p text:style-name="P14" loext:marker-style-name="T2"><text:span text:style-name="T3"><text:s text:c="4"/>) VALUES (</text:span><text:span text:style-name="T3"/></text:p>
      <text:p text:style-name="P14" loext:marker-style-name="T2"><text:span text:style-name="T3"><text:s text:c="8"/>v_new_id, p_id_route, 'scheduled',</text:span><text:span text:style-name="T3"/></text:p>
      <text:p text:style-name="P14" loext:marker-style-name="T2"><text:span text:style-name="T3"><text:s text:c="8"/>p_planned_date, p_arrival_date</text:span><text:span text:style-name="T3"/></text:p>
      <text:p text:style-name="P14"><text:span text:style-name="T3"><text:s text:c="4"/></text:span><text:span text:style-name="T4">);</text:span></text:p>
      <text:p text:style-name="P14"/>
      <text:p text:style-name="P15"><text:s text:c="4"/>RAISE NOTICE 'Создан новый рейс id=% для маршрута id=% на дату %',</text:p>
      <text:p text:style-name="P14" loext:marker-style-name="T2"><text:span text:style-name="T4"><text:s text:c="8"/></text:span><text:span text:style-name="T3">v_new_id, p_id_route, p_planned_date;</text:span></text:p>
      <text:p text:style-name="P14" loext:marker-style-name="T2"><text:span text:style-name="T3">END;</text:span><text:span text:style-name="T3"/></text:p>
      <text:p text:style-name="P14" loext:marker-style-name="T2"><text:span text:style-name="T3">$$;</text:span><text:span text:style-name="T3"/></text:p>
      <text:p text:style-name="P16" loext:marker-style-name="T2"/>
      <text:p text:style-name="P14" loext:marker-style-name="T2"><text:span text:style-name="T3"/></text:p>
      <text:p text:style-name="P14"><draw:frame draw:style-name="fr1" draw:name="Изображение3" text:anchor-type="char" svg:width="4.787cm" svg:height="1.138cm" draw:z-index="2"><draw:image xlink:href="Pictures/10000001000000B50000002B126F36A8.png" xlink:type="simple" xlink:show="embed" xlink:actuate="onLoad" draw:mime-type="image/png"/></draw:frame></text:p>
      <text:p text:style-name="P7"/>
      <text:p text:style-name="P7">Тестирование процедуры:</text:p>
      <text:p text:style-name="P14"><text:span text:style-name="T4"/></text:p>
      <text:p text:style-name="P14" loext:marker-style-name="T2"><text:span text:style-name="T3">CALL laba.sp_create_trip(1, '2026-07-01', '2026-07-02');</text:span><text:span text:style-name="T3"/></text:p>
      <text:p text:style-name="P16" loext:marker-style-name="T2"/>
      <text:p text:style-name="P14" loext:marker-style-name="T2"><text:span text:style-name="T4"/></text:p>
      <text:p text:style-name="P14" loext:marker-style-name="T2"><text:span text:style-name="T3">SELECT * FROM laba.trip ORDER BY id_trip DESC LIMIT 3;</text:span><text:span text:style-name="T3"/></text:p>
      <text:p text:style-name="P16" loext:marker-style-name="T2"/>
      <text:p text:style-name="P14"><text:span text:style-name="T4"/></text:p>
      <text:p text:style-name="P15">CALL laba.sp_create_trip(999, '2026-07-01', '2026-07-02');</text:p>
      <text:p text:style-name="Standard"><draw:frame draw:style-name="fr2" draw:name="Изображение4" text:anchor-type="char" svg:width="16.501cm" svg:height="5.604cm" draw:z-index="3"><draw:image xlink:href="Pictures/10000001000003410000011BD9745E15.png" xlink:type="simple" xlink:show="embed" xlink:actuate="onLoad" draw:mime-type="image/png"/></draw:frame></text:p>
      <text:h text:style-name="Heading_20_3" text:outline-level="3">Процедура 3: Формирование общей выручки за сутки</text:h>
      <text:p text:style-name="P7"><text:s/>вычисляет и выводит в консоль общую выручку от продажи билетов за указанную дату. Принимает один параметр - дату (по умолчанию вчерашний день). Выводит детализацию по маршрутам и итоговую сумму</text:p>
      <text:p text:style-name="P7">Скрипт создания процедуры:</text:p>
      <text:p text:style-name="P14"><text:soft-page-break/></text:p>
      <text:p text:style-name="P14" loext:marker-style-name="T2"><text:span text:style-name="T3">CREATE OR REPLACE PROCEDURE laba.sp_daily_revenue(</text:span><text:span text:style-name="T3"/></text:p>
      <text:p text:style-name="P14" loext:marker-style-name="T2"><text:span text:style-name="T3"><text:s text:c="4"/>p_date DATE DEFAULT CURRENT_DATE - INTERVAL '1 day'</text:span><text:span text:style-name="T3"/></text:p>
      <text:p text:style-name="P14" loext:marker-style-name="T2"><text:span text:style-name="T3">)</text:span><text:span text:style-name="T3"/></text:p>
      <text:p text:style-name="P14" loext:marker-style-name="T2"><text:span text:style-name="T3">LANGUAGE plpgsql</text:span><text:span text:style-name="T3"/></text:p>
      <text:p text:style-name="P14" loext:marker-style-name="T2"><text:span text:style-name="T3">AS $$</text:span><text:span text:style-name="T3"/></text:p>
      <text:p text:style-name="P14" loext:marker-style-name="T2"><text:span text:style-name="T3">DECLARE</text:span><text:span text:style-name="T3"/></text:p>
      <text:p text:style-name="P14" loext:marker-style-name="T2"><text:span text:style-name="T3"><text:s text:c="4"/>v_total <text:s text:c="5"/>NUMERIC(12,2) := 0;</text:span><text:span text:style-name="T3"/></text:p>
      <text:p text:style-name="P14" loext:marker-style-name="T2"><text:span text:style-name="T3"><text:s text:c="4"/>v_count <text:s text:c="5"/>INTEGER <text:s text:c="6"/>:= 0;</text:span><text:span text:style-name="T3"/></text:p>
      <text:p text:style-name="P14" loext:marker-style-name="T2"><text:span text:style-name="T3"><text:s text:c="4"/>r_rec <text:s text:c="7"/>RECORD;</text:span><text:span text:style-name="T3"/></text:p>
      <text:p text:style-name="P14" loext:marker-style-name="T2"><text:span text:style-name="T3">BEGIN</text:span><text:span text:style-name="T3"/></text:p>
      <text:p text:style-name="P14" loext:marker-style-name="T2"><text:span text:style-name="T3"><text:s text:c="4"/>RAISE NOTICE '=== </text:span><text:span text:style-name="T4">Выручка</text:span><text:span text:style-name="T3"> </text:span><text:span text:style-name="T4">за</text:span><text:span text:style-name="T3"> % ===', p_date;</text:span></text:p>
      <text:p text:style-name="P14" loext:marker-style-name="T2"><text:span text:style-name="T3"><text:s text:c="4"/>RAISE NOTICE '%-30s %-10s %-10s',</text:span><text:span text:style-name="T3"/></text:p>
      <text:p text:style-name="P14" loext:marker-style-name="T2"><text:span text:style-name="T3"><text:s text:c="8"/>'</text:span><text:span text:style-name="T4">Маршрут</text:span><text:span text:style-name="T3">', '</text:span><text:span text:style-name="T4">Билетов</text:span><text:span text:style-name="T3">', '</text:span><text:span text:style-name="T4">Выручка</text:span><text:span text:style-name="T3">';</text:span></text:p>
      <text:p text:style-name="P14" loext:marker-style-name="T2"><text:span text:style-name="T3"><text:s text:c="4"/>RAISE NOTICE '%', REPEAT('-', 55);</text:span><text:span text:style-name="T3"/></text:p>
      <text:p text:style-name="P16" loext:marker-style-name="T2"/>
      <text:p text:style-name="P14"><text:span text:style-name="T4"/></text:p>
      <text:p text:style-name="P14" loext:marker-style-name="T2"><text:span text:style-name="T4"><text:s text:c="4"/></text:span><text:span text:style-name="T3">FOR r_rec IN</text:span></text:p>
      <text:p text:style-name="P14" loext:marker-style-name="T2"><text:span text:style-name="T3"><text:s text:c="8"/>SELECT</text:span><text:span text:style-name="T3"/></text:p>
      <text:p text:style-name="P14" loext:marker-style-name="T2"><text:span text:style-name="T3"><text:s text:c="12"/>r.departure_point || ' -&gt; ' || r.destination_point AS route_name,</text:span><text:span text:style-name="T3"/></text:p>
      <text:p text:style-name="P14" loext:marker-style-name="T2"><text:span text:style-name="T3"><text:s text:c="12"/>COUNT(t.id_ticket) <text:s/>AS cnt,</text:span><text:span text:style-name="T3"/></text:p>
      <text:p text:style-name="P14" loext:marker-style-name="T2"><text:span text:style-name="T3"><text:s text:c="12"/>COALESCE(SUM(t.price), 0) AS revenue</text:span><text:span text:style-name="T3"/></text:p>
      <text:p text:style-name="P14" loext:marker-style-name="T2"><text:span text:style-name="T3"><text:s text:c="8"/>FROM laba.ticket t</text:span><text:span text:style-name="T3"/></text:p>
      <text:p text:style-name="P14" loext:marker-style-name="T2"><text:span text:style-name="T3"><text:s text:c="8"/>JOIN laba.route r ON r.id_route = t.id_route</text:span><text:span text:style-name="T3"/></text:p>
      <text:p text:style-name="P14" loext:marker-style-name="T2"><text:span text:style-name="T3"><text:s text:c="8"/>JOIN laba.trip tr ON tr.id_route = r.id_route</text:span><text:span text:style-name="T3"/></text:p>
      <text:p text:style-name="P14" loext:marker-style-name="T2"><text:span text:style-name="T3"><text:s text:c="8"/>WHERE tr.planned_date = p_date</text:span><text:span text:style-name="T3"/></text:p>
      <text:p text:style-name="P14" loext:marker-style-name="T2"><text:span text:style-name="T3"><text:s text:c="10"/>AND t.payment_status = 'paid'</text:span><text:span text:style-name="T3"/></text:p>
      <text:p text:style-name="P14" loext:marker-style-name="T2"><text:span text:style-name="T3"><text:s text:c="8"/>GROUP BY r.departure_point, r.destination_point</text:span><text:span text:style-name="T3"/></text:p>
      <text:p text:style-name="P14" loext:marker-style-name="T2"><text:span text:style-name="T3"><text:s text:c="8"/>ORDER BY revenue DESC</text:span><text:span text:style-name="T3"/></text:p>
      <text:p text:style-name="P14" loext:marker-style-name="T2"><text:span text:style-name="T3"><text:s text:c="4"/>LOOP</text:span><text:span text:style-name="T3"/></text:p>
      <text:p text:style-name="P14" loext:marker-style-name="T2"><text:span text:style-name="T3"><text:s text:c="8"/>RAISE NOTICE '%-30s %-10s %-10s',</text:span><text:span text:style-name="T3"/></text:p>
      <text:p text:style-name="P14" loext:marker-style-name="T2"><text:span text:style-name="T3"><text:s text:c="12"/>r_rec.route_name, r_rec.cnt, r_rec.revenue;</text:span><text:span text:style-name="T3"/></text:p>
      <text:p text:style-name="P14" loext:marker-style-name="T2"><text:span text:style-name="T3"><text:s text:c="8"/>v_total := v_total + r_rec.revenue;</text:span><text:span text:style-name="T3"/></text:p>
      <text:p text:style-name="P14" loext:marker-style-name="T2"><text:span text:style-name="T3"><text:s text:c="8"/>v_count := v_count + r_rec.cnt;</text:span><text:span text:style-name="T3"/></text:p>
      <text:p text:style-name="P14" loext:marker-style-name="T2"><text:span text:style-name="T3"><text:s text:c="4"/>END LOOP;</text:span><text:span text:style-name="T3"/></text:p>
      <text:p text:style-name="P16" loext:marker-style-name="T2"/>
      <text:p text:style-name="P14" loext:marker-style-name="T2"><text:span text:style-name="T3"><text:s text:c="4"/>RAISE NOTICE '%', REPEAT('-', 55);</text:span><text:span text:style-name="T3"/></text:p>
      <text:p text:style-name="P14" loext:marker-style-name="T2"><text:span text:style-name="T3"><text:s text:c="4"/>RAISE NOTICE '</text:span><text:span text:style-name="T4">ИТОГО</text:span><text:span text:style-name="T3">: % </text:span><text:span text:style-name="T4">билетов</text:span><text:span text:style-name="T3">, </text:span><text:span text:style-name="T4">выручка</text:span><text:span text:style-name="T3">: % </text:span><text:span text:style-name="T4">руб</text:span><text:span text:style-name="T3">.', v_count, v_total;</text:span></text:p>
      <text:p text:style-name="P14" loext:marker-style-name="T2"><text:span text:style-name="T3">END;</text:span><text:span text:style-name="T3"/></text:p>
      <text:p text:style-name="P14" loext:marker-style-name="T2"><text:span text:style-name="T3">$$;</text:span><text:span text:style-name="T3"/></text:p>
      <text:p text:style-name="P16" loext:marker-style-name="T2"/>
      <text:p text:style-name="P14" loext:marker-style-name="T2"><text:span text:style-name="T3"/></text:p>
      <text:p text:style-name="P13"><text:tab/></text:p>
      <text:p text:style-name="P7">Тестирование процедуры:</text:p>
      <text:p text:style-name="P14"><text:span text:style-name="T4"/></text:p>
      <text:p text:style-name="P14" loext:marker-style-name="T2"><text:span text:style-name="T3">CALL laba.sp_daily_revenue();</text:span><text:span text:style-name="T3"/></text:p>
      <text:p text:style-name="P16" loext:marker-style-name="T2"/>
      <text:p text:style-name="P14" loext:marker-style-name="T2"><text:span text:style-name="T4"/></text:p>
      <text:p text:style-name="P14" loext:marker-style-name="T2"><text:span text:style-name="T3">CALL laba.sp_daily_revenue('2026-06-16');</text:span><text:span text:style-name="T3"/></text:p>
      <text:p text:style-name="Standard"><draw:frame draw:style-name="fr2" draw:name="Изображение5" text:anchor-type="char" svg:width="16.501cm" svg:height="5.625cm" draw:z-index="4"><draw:image xlink:href="Pictures/10000001000003410000011CFF27D4E7.png" xlink:type="simple" xlink:show="embed" xlink:actuate="onLoad" draw:mime-type="image/png"/></draw:frame><text:soft-page-break/></text:p>
      <text:h text:style-name="Heading_20_2" text:outline-level="2">3.2 <text:s/>Триггеры</text:h>
      <text:h text:style-name="Heading_20_3" text:outline-level="3">Триггер 1: Проверка корректности цены билета и применение скидки</text:h>
      <text:p text:style-name="P7">:Триггер срабатывает перед вставкой или обновлением записи в таблице ticket. Проверяет, что цена положительная. Если билет покупается заранее (дата отправления больше текущей даты), автоматически применяет скидку 5% для предварительной продажи.</text:p>
      <text:p text:style-name="P7">Скрипт создания триггерной функции и триггера:</text:p>
      <text:p text:style-name="P16" loext:marker-style-name="T2"/>
      <text:p text:style-name="P14" loext:marker-style-name="T2"><text:span text:style-name="T3">CREATE OR REPLACE FUNCTION laba.fn_check_ticket_price()</text:span><text:span text:style-name="T3"/></text:p>
      <text:p text:style-name="P15">RETURNS TRIGGER AS $$</text:p>
      <text:p text:style-name="P15">BEGIN</text:p>
      <text:p text:style-name="P14"><text:span text:style-name="T4"/></text:p>
      <text:p text:style-name="P15"><text:s text:c="4"/>IF NEW.price &lt;= 0 THEN</text:p>
      <text:p text:style-name="P15"><text:s text:c="8"/>RAISE EXCEPTION 'Цена билета должна быть положительной, получено: %', NEW.price;</text:p>
      <text:p text:style-name="P15"><text:s text:c="4"/>END IF;</text:p>
      <text:p text:style-name="P14"/>
      <text:p text:style-name="P14"><text:span text:style-name="T4"/></text:p>
      <text:p text:style-name="P14" loext:marker-style-name="T2"><text:span text:style-name="T4"><text:s text:c="4"/></text:span><text:span text:style-name="T3">IF NEW.departure_date &gt; CURRENT_DATE</text:span></text:p>
      <text:p text:style-name="P14" loext:marker-style-name="T2"><text:span text:style-name="T3"><text:s text:c="7"/>AND NEW.sale_date &lt; NEW.departure_date THEN</text:span><text:span text:style-name="T3"/></text:p>
      <text:p text:style-name="P14" loext:marker-style-name="T2"><text:span text:style-name="T3"><text:s text:c="8"/>NEW.price := ROUND(NEW.price * 0.95, 2);</text:span><text:span text:style-name="T3"/></text:p>
      <text:p text:style-name="P14" loext:marker-style-name="T2"><text:span text:style-name="T3"><text:s text:c="8"/></text:span><text:span text:style-name="T4">RAISE NOTICE 'Применена скидка 5%% для предварительной продажи. Цена</text:span><text:span text:style-name="T3">: %', NEW.price;</text:span></text:p>
      <text:p text:style-name="P14" loext:marker-style-name="T2"><text:span text:style-name="T3"><text:s text:c="4"/>END IF;</text:span><text:span text:style-name="T3"/></text:p>
      <text:p text:style-name="P16" loext:marker-style-name="T2"/>
      <text:p text:style-name="P14" loext:marker-style-name="T2"><text:span text:style-name="T3"><text:s text:c="4"/>RETURN NEW;</text:span><text:span text:style-name="T3"/></text:p>
      <text:p text:style-name="P14" loext:marker-style-name="T2"><text:span text:style-name="T3">END;</text:span><text:span text:style-name="T3"/></text:p>
      <text:p text:style-name="P14" loext:marker-style-name="T2"><text:span text:style-name="T3">$$ LANGUAGE plpgsql;</text:span><text:span text:style-name="T3"/></text:p>
      <text:p text:style-name="P16" loext:marker-style-name="T2"/>
      <text:p text:style-name="P14" loext:marker-style-name="T2"><text:span text:style-name="T3">CREATE TRIGGER trg_check_ticket_price</text:span><text:span text:style-name="T3"/></text:p>
      <text:p text:style-name="P14" loext:marker-style-name="T2"><text:span text:style-name="T3">BEFORE INSERT OR UPDATE ON laba.ticket</text:span><text:span text:style-name="T3"/></text:p>
      <text:p text:style-name="P14" loext:marker-style-name="T2"><text:span text:style-name="T3">FOR EACH ROW EXECUTE PROCEDURE laba.fn_check_ticket_price();</text:span><text:span text:style-name="T3"/></text:p>
      <text:p text:style-name="P12"><draw:frame draw:style-name="fr1" draw:name="Изображение6" text:anchor-type="char" svg:width="5.131cm" svg:height="1.296cm" draw:z-index="5"><draw:image xlink:href="Pictures/10000001000000C20000003132A6AAE3.png" xlink:type="simple" xlink:show="embed" xlink:actuate="onLoad" draw:mime-type="image/png"/></draw:frame><text:soft-page-break/></text:p>
      <text:p text:style-name="P7"/>
      <text:p text:style-name="P7"/>
      <text:p text:style-name="P7">Тестирование триггера:</text:p>
      <text:p text:style-name="P14"><text:span text:style-name="T4"/></text:p>
      <text:p text:style-name="P14" loext:marker-style-name="T2"><text:span text:style-name="T3">INSERT INTO laba.ticket (id_ticket, id_stop, id_cash_desk, id_route, id_seat,</text:span><text:span text:style-name="T3"/></text:p>
      <text:p text:style-name="P14" loext:marker-style-name="T2"><text:span text:style-name="T3"><text:s text:c="4"/>id_passport, boarding_point, arrival_point, departure_date, arrival_time,</text:span><text:span text:style-name="T3"/></text:p>
      <text:p text:style-name="P14" loext:marker-style-name="T2"><text:span text:style-name="T3"><text:s text:c="4"/>price, payment_status, sale_date, ticket_status)</text:span><text:span text:style-name="T3"/></text:p>
      <text:p text:style-name="P14" loext:marker-style-name="T2"><text:span text:style-name="T3">VALUES (100, 1, 1, 1, 2, 1, '</text:span><text:span text:style-name="T4">Санкт</text:span><text:span text:style-name="T3">-</text:span><text:span text:style-name="T4">Петербург</text:span><text:span text:style-name="T3">', '</text:span><text:span text:style-name="T4">Москва</text:span><text:span text:style-name="T3">',</text:span></text:p>
      <text:p text:style-name="P14" loext:marker-style-name="T2"><text:span text:style-name="T3"><text:s text:c="4"/>CURRENT_DATE + 10, '16:00:00', 3000.00, 'pending', CURRENT_DATE, 'active');</text:span><text:span text:style-name="T3"/></text:p>
      <text:p text:style-name="P16" loext:marker-style-name="T2"/>
      <text:p text:style-name="P14" loext:marker-style-name="T2"><text:span text:style-name="T3"/></text:p>
      <text:p text:style-name="P14" loext:marker-style-name="T2"><text:span text:style-name="T3">SELECT id_ticket, price FROM laba.ticket WHERE id_ticket = 100;</text:span><text:span text:style-name="T3"/></text:p>
      <text:p text:style-name="P16" loext:marker-style-name="T2"/>
      <text:p text:style-name="P14"><text:span text:style-name="T4"/></text:p>
      <text:p text:style-name="P14" loext:marker-style-name="T2"><text:span text:style-name="T3">INSERT INTO laba.ticket (id_ticket, id_stop, id_cash_desk, id_route, id_seat,</text:span><text:span text:style-name="T3"/></text:p>
      <text:p text:style-name="P14" loext:marker-style-name="T2"><text:span text:style-name="T3"><text:s text:c="4"/>id_passport, boarding_point, arrival_point, departure_date, arrival_time,</text:span><text:span text:style-name="T3"/></text:p>
      <text:p text:style-name="P14" loext:marker-style-name="T2"><text:span text:style-name="T3"><text:s text:c="4"/>price, payment_status, sale_date, ticket_status)</text:span><text:span text:style-name="T3"/></text:p>
      <text:p text:style-name="P14" loext:marker-style-name="T2"><text:span text:style-name="T3">VALUES (101, 1, 1, 1, 2, 1, '</text:span><text:span text:style-name="T4">Санкт</text:span><text:span text:style-name="T3">-</text:span><text:span text:style-name="T4">Петербург</text:span><text:span text:style-name="T3">', '</text:span><text:span text:style-name="T4">Москва</text:span><text:span text:style-name="T3">',</text:span></text:p>
      <text:p text:style-name="P14" loext:marker-style-name="T2"><text:span text:style-name="T3"><text:s text:c="4"/>CURRENT_DATE + 5, '16:00:00', 0.00, 'pending', CURRENT_DATE, 'active');</text:span><text:span text:style-name="T3"/></text:p>
      <text:p text:style-name="P12"><text:span text:style-name="T5">[</text:span></text:p>
      <text:p text:style-name="Standard"><draw:frame draw:style-name="fr2" draw:name="Изображение7" text:anchor-type="char" svg:width="16.501cm" svg:height="3.485cm" draw:z-index="6"><draw:image xlink:href="Pictures/100000010000031B000000A8D3B90B8A.png" xlink:type="simple" xlink:show="embed" xlink:actuate="onLoad" draw:mime-type="image/png"/></draw:frame></text:p>
      <text:h text:style-name="Heading_20_3" text:outline-level="3">Триггер 2: Синхронизация статуса места при продаже и отмене билета</text:h>
      <text:p text:style-name="P7">Описание: Триггер срабатывает после вставки или обновления в таблице ticket. При продаже нового билета автоматически помечает соответствующее место в таблице train_set как 'sold'. При отмене билета - возвращает место в статус 'free'.</text:p>
      <text:p text:style-name="P7">Скрипт создания триггерной функции и триггера:</text:p>
      <text:p text:style-name="P14"/>
      <text:p text:style-name="P14" loext:marker-style-name="T2"><text:span text:style-name="T3">CREATE OR REPLACE FUNCTION laba.fn_sync_seat_status()</text:span><text:span text:style-name="T3"/></text:p>
      <text:p text:style-name="P15">RETURNS TRIGGER AS $$</text:p>
      <text:p text:style-name="P15">BEGIN</text:p>
      <text:p text:style-name="P14"><text:span text:style-name="T4"/></text:p>
      <text:p text:style-name="P14" loext:marker-style-name="T2"><text:span text:style-name="T4"><text:s text:c="4"/></text:span><text:span text:style-name="T3">IF TG_OP = 'INSERT' AND NEW.ticket_status = 'active' THEN</text:span></text:p>
      <text:p text:style-name="P14" loext:marker-style-name="T2"><text:span text:style-name="T3"><text:s text:c="8"/>UPDATE laba.train_set ts</text:span><text:span text:style-name="T3"/></text:p>
      <text:p text:style-name="P14" loext:marker-style-name="T2"><text:soft-page-break/><text:span text:style-name="T3"><text:s text:c="8"/>SET status = 'sold'</text:span><text:span text:style-name="T3"/></text:p>
      <text:p text:style-name="P14" loext:marker-style-name="T2"><text:span text:style-name="T3"><text:s text:c="8"/>WHERE ts.id_seat = NEW.id_seat</text:span><text:span text:style-name="T3"/></text:p>
      <text:p text:style-name="P14" loext:marker-style-name="T2"><text:span text:style-name="T3"><text:s text:c="10"/>AND ts.id_trip IN (</text:span><text:span text:style-name="T3"/></text:p>
      <text:p text:style-name="P14" loext:marker-style-name="T2"><text:span text:style-name="T3"><text:s text:c="14"/>SELECT tr.id_trip FROM laba.trip tr</text:span><text:span text:style-name="T3"/></text:p>
      <text:p text:style-name="P14" loext:marker-style-name="T2"><text:span text:style-name="T3"><text:s text:c="14"/>WHERE tr.id_route = NEW.id_route</text:span><text:span text:style-name="T3"/></text:p>
      <text:p text:style-name="P14" loext:marker-style-name="T2"><text:span text:style-name="T3"><text:s text:c="16"/>AND tr.planned_date = NEW.departure_date</text:span><text:span text:style-name="T3"/></text:p>
      <text:p text:style-name="P14" loext:marker-style-name="T2"><text:span text:style-name="T3"><text:s text:c="10"/>);</text:span><text:span text:style-name="T3"/></text:p>
      <text:p text:style-name="P14" loext:marker-style-name="T2"><text:span text:style-name="T3"><text:s text:c="8"/>RAISE NOTICE '</text:span><text:span text:style-name="T4">Место</text:span><text:span text:style-name="T3"> id=% </text:span><text:span text:style-name="T4">помечено</text:span><text:span text:style-name="T3"> </text:span><text:span text:style-name="T4">как</text:span><text:span text:style-name="T3"> sold (</text:span><text:span text:style-name="T4">билет</text:span><text:span text:style-name="T3"> %)', NEW.id_seat, NEW.id_ticket;</text:span></text:p>
      <text:p text:style-name="P14"><text:span text:style-name="T3"><text:s text:c="4"/></text:span><text:span text:style-name="T4">END IF;</text:span></text:p>
      <text:p text:style-name="P14"/>
      <text:p text:style-name="P14"><text:span text:style-name="T4"/></text:p>
      <text:p text:style-name="P14" loext:marker-style-name="T2"><text:span text:style-name="T4"><text:s text:c="4"/></text:span><text:span text:style-name="T3">IF TG_OP = 'UPDATE'</text:span></text:p>
      <text:p text:style-name="P14" loext:marker-style-name="T2"><text:span text:style-name="T3"><text:s text:c="7"/>AND OLD.ticket_status = 'active'</text:span><text:span text:style-name="T3"/></text:p>
      <text:p text:style-name="P14" loext:marker-style-name="T2"><text:span text:style-name="T3"><text:s text:c="7"/>AND NEW.ticket_status = 'cancelled' THEN</text:span><text:span text:style-name="T3"/></text:p>
      <text:p text:style-name="P14" loext:marker-style-name="T2"><text:span text:style-name="T3"><text:s text:c="8"/>UPDATE laba.train_set ts</text:span><text:span text:style-name="T3"/></text:p>
      <text:p text:style-name="P14" loext:marker-style-name="T2"><text:span text:style-name="T3"><text:s text:c="8"/>SET status = 'free'</text:span><text:span text:style-name="T3"/></text:p>
      <text:p text:style-name="P14" loext:marker-style-name="T2"><text:span text:style-name="T3"><text:s text:c="8"/>WHERE ts.id_seat = NEW.id_seat</text:span><text:span text:style-name="T3"/></text:p>
      <text:p text:style-name="P14" loext:marker-style-name="T2"><text:span text:style-name="T3"><text:s text:c="10"/>AND ts.id_trip IN (</text:span><text:span text:style-name="T3"/></text:p>
      <text:p text:style-name="P14" loext:marker-style-name="T2"><text:span text:style-name="T3"><text:s text:c="14"/>SELECT tr.id_trip FROM laba.trip tr</text:span><text:span text:style-name="T3"/></text:p>
      <text:p text:style-name="P14" loext:marker-style-name="T2"><text:span text:style-name="T3"><text:s text:c="14"/>WHERE tr.id_route = NEW.id_route</text:span><text:span text:style-name="T3"/></text:p>
      <text:p text:style-name="P14" loext:marker-style-name="T2"><text:span text:style-name="T3"><text:s text:c="16"/>AND tr.planned_date = NEW.departure_date</text:span><text:span text:style-name="T3"/></text:p>
      <text:p text:style-name="P14" loext:marker-style-name="T2"><text:span text:style-name="T3"><text:s text:c="10"/>);</text:span><text:span text:style-name="T3"/></text:p>
      <text:p text:style-name="P14" loext:marker-style-name="T2"><text:span text:style-name="T3"><text:s text:c="8"/>RAISE NOTICE '</text:span><text:span text:style-name="T4">Место</text:span><text:span text:style-name="T3"> id=% </text:span><text:span text:style-name="T4">освобождено</text:span><text:span text:style-name="T3"> (</text:span><text:span text:style-name="T4">билет</text:span><text:span text:style-name="T3"> % </text:span><text:span text:style-name="T4">отменён</text:span><text:span text:style-name="T3">)', NEW.id_seat, NEW.id_ticket;</text:span></text:p>
      <text:p text:style-name="P14" loext:marker-style-name="T2"><text:span text:style-name="T3"><text:s text:c="4"/>END IF;</text:span><text:span text:style-name="T3"/></text:p>
      <text:p text:style-name="P16" loext:marker-style-name="T2"/>
      <text:p text:style-name="P14" loext:marker-style-name="T2"><text:span text:style-name="T3"><text:s text:c="4"/>RETURN NEW;</text:span><text:span text:style-name="T3"/></text:p>
      <text:p text:style-name="P14" loext:marker-style-name="T2"><text:span text:style-name="T3">END;</text:span><text:span text:style-name="T3"/></text:p>
      <text:p text:style-name="P14" loext:marker-style-name="T2"><text:span text:style-name="T3">$$ LANGUAGE plpgsql;</text:span><text:span text:style-name="T3"/></text:p>
      <text:p text:style-name="P16" loext:marker-style-name="T2"/>
      <text:p text:style-name="P14" loext:marker-style-name="T2"><text:span text:style-name="T3">CREATE TRIGGER trg_sync_seat_status</text:span><text:span text:style-name="T3"/></text:p>
      <text:p text:style-name="P14" loext:marker-style-name="T2"><text:span text:style-name="T3">AFTER INSERT OR UPDATE ON laba.ticket</text:span><text:span text:style-name="T3"/></text:p>
      <text:p text:style-name="P14" loext:marker-style-name="T2"><text:span text:style-name="T3">FOR EACH ROW EXECUTE PROCEDURE laba.fn_sync_seat_status();</text:span><text:span text:style-name="T3"/></text:p>
      <text:p text:style-name="P12"><draw:frame draw:style-name="fr1" draw:name="Изображение8" text:anchor-type="char" svg:width="5.846cm" svg:height="1.826cm" draw:z-index="7"><draw:image xlink:href="Pictures/10000001000000DD00000045D9A3F687.png" xlink:type="simple" xlink:show="embed" xlink:actuate="onLoad" draw:mime-type="image/png"/></draw:frame></text:p>
      <text:p text:style-name="P7"/>
      <text:p text:style-name="P7"/>
      <text:p text:style-name="P7">Тестирование триггера:</text:p>
      <text:p text:style-name="P14"><text:span text:style-name="T4"/></text:p>
      <text:p text:style-name="P14" loext:marker-style-name="T2"><text:span text:style-name="T3">SELECT id_set, id_seat, status FROM laba.train_set WHERE id_seat = 2;</text:span><text:span text:style-name="T3"/></text:p>
      <text:p text:style-name="P16" loext:marker-style-name="T2"/>
      <text:p text:style-name="P14"><text:span text:style-name="T4"/></text:p>
      <text:p text:style-name="P14" loext:marker-style-name="T2"><text:span text:style-name="T3">UPDATE laba.ticket SET ticket_status = 'cancelled' WHERE id_ticket = 7;</text:span><text:span text:style-name="T3"/></text:p>
      <text:p text:style-name="P16" loext:marker-style-name="T2"/>
      <text:p text:style-name="P14" loext:marker-style-name="T2"><text:span text:style-name="T4"/></text:p>
      <text:p text:style-name="P14" loext:marker-style-name="T2"><text:span text:style-name="T3">SELECT id_set, id_seat, status FROM laba.train_set WHERE id_seat = 2;</text:span><text:span text:style-name="T3"/></text:p>
      <text:p text:style-name="P12"/>
      <text:p text:style-name="Standard"><draw:frame draw:style-name="fr2" draw:name="Изображение9" text:anchor-type="char" svg:width="16.501cm" svg:height="9.922cm" draw:z-index="8"><draw:image xlink:href="Pictures/10000001000002E9000001C0FCA101E4.png" xlink:type="simple" xlink:show="embed" xlink:actuate="onLoad" draw:mime-type="image/png"/></draw:frame><text:soft-page-break/></text:p>
      <text:h text:style-name="Heading_20_3" text:outline-level="3">Триггер 3: Запрет удаления маршрута при наличии активных рейсов</text:h>
      <text:p text:style-name="P7">Описание: Триггер срабатывает перед удалением записи из таблицы route. Проверяет наличие активных или запланированных рейсов на данный маршрут. Если такие рейсы есть - удаление запрещается с выдачей сообщения об ошибке.</text:p>
      <text:p text:style-name="P7">Скрипт создания триггерной функции и триггера:</text:p>
      <text:p text:style-name="P14"><text:span text:style-name="T4"/></text:p>
      <text:p text:style-name="P14"/>
      <text:p text:style-name="P14" loext:marker-style-name="T2"><text:span text:style-name="T3">CREATE OR REPLACE FUNCTION laba.fn_prevent_route_delete()</text:span><text:span text:style-name="T3"/></text:p>
      <text:p text:style-name="P14" loext:marker-style-name="T2"><text:span text:style-name="T3">RETURNS TRIGGER AS $$</text:span><text:span text:style-name="T3"/></text:p>
      <text:p text:style-name="P14" loext:marker-style-name="T2"><text:span text:style-name="T3">DECLARE</text:span><text:span text:style-name="T3"/></text:p>
      <text:p text:style-name="P14" loext:marker-style-name="T2"><text:span text:style-name="T3"><text:s text:c="4"/>v_active_trips INTEGER;</text:span><text:span text:style-name="T3"/></text:p>
      <text:p text:style-name="P14" loext:marker-style-name="T2"><text:span text:style-name="T3">BEGIN</text:span><text:span text:style-name="T3"/></text:p>
      <text:p text:style-name="P14" loext:marker-style-name="T2"><text:span text:style-name="T3"><text:s text:c="4"/>SELECT COUNT(*) INTO v_active_trips</text:span><text:span text:style-name="T3"/></text:p>
      <text:p text:style-name="P14" loext:marker-style-name="T2"><text:span text:style-name="T3"><text:s text:c="4"/>FROM laba.trip</text:span><text:span text:style-name="T3"/></text:p>
      <text:p text:style-name="P14" loext:marker-style-name="T2"><text:span text:style-name="T3"><text:s text:c="4"/>WHERE id_route = OLD.id_route</text:span><text:span text:style-name="T3"/></text:p>
      <text:p text:style-name="P14" loext:marker-style-name="T2"><text:span text:style-name="T3"><text:s text:c="6"/>AND status_trip IN ('active', 'scheduled')</text:span><text:span text:style-name="T3"/></text:p>
      <text:p text:style-name="P14" loext:marker-style-name="T2"><text:span text:style-name="T3"><text:s text:c="6"/>AND planned_date &gt;= CURRENT_DATE;</text:span><text:span text:style-name="T3"/></text:p>
      <text:p text:style-name="P16" loext:marker-style-name="T2"/>
      <text:p text:style-name="P14" loext:marker-style-name="T2"><text:span text:style-name="T3"><text:s text:c="4"/>IF v_active_trips &gt; 0 THEN</text:span><text:span text:style-name="T3"/></text:p>
      <text:p text:style-name="P14" loext:marker-style-name="T2"><text:span text:style-name="T3"><text:s text:c="8"/>RAISE EXCEPTION</text:span><text:span text:style-name="T3"/></text:p>
      <text:p text:style-name="P14"><text:span text:style-name="T3"><text:s text:c="12"/></text:span><text:span text:style-name="T4">'Невозможно удалить маршрут id=%. Существует % активных/запланированных рейсов.',</text:span></text:p>
      <text:p text:style-name="P14" loext:marker-style-name="T2"><text:span text:style-name="T4"><text:s text:c="12"/></text:span><text:span text:style-name="T3">OLD.id_route, v_active_trips;</text:span></text:p>
      <text:p text:style-name="P14" loext:marker-style-name="T2"><text:span text:style-name="T3"><text:s text:c="4"/>END IF;</text:span><text:span text:style-name="T3"/></text:p>
      <text:p text:style-name="P16" loext:marker-style-name="T2"><text:soft-page-break/></text:p>
      <text:p text:style-name="P14" loext:marker-style-name="T2"><text:span text:style-name="T3"><text:s text:c="4"/>RETURN OLD;</text:span><text:span text:style-name="T3"/></text:p>
      <text:p text:style-name="P14" loext:marker-style-name="T2"><text:span text:style-name="T3">END;</text:span><text:span text:style-name="T3"/></text:p>
      <text:p text:style-name="P14" loext:marker-style-name="T2"><text:span text:style-name="T3">$$ LANGUAGE plpgsql;</text:span><text:span text:style-name="T3"/></text:p>
      <text:p text:style-name="P16" loext:marker-style-name="T2"/>
      <text:p text:style-name="P14" loext:marker-style-name="T2"><text:span text:style-name="T3">CREATE TRIGGER trg_prevent_route_delete</text:span><text:span text:style-name="T3"/></text:p>
      <text:p text:style-name="P14" loext:marker-style-name="T2"><text:span text:style-name="T3">BEFORE DELETE ON laba.route</text:span><text:span text:style-name="T3"/></text:p>
      <text:p text:style-name="P14" loext:marker-style-name="T2"><text:span text:style-name="T3">FOR EACH ROW EXECUTE PROCEDURE laba.fn_prevent_route_delete();</text:span><text:span text:style-name="T3"/></text:p>
      <text:p text:style-name="P12"><draw:frame draw:style-name="fr1" draw:name="Изображение10" text:anchor-type="char" svg:width="3.597cm" svg:height="0.924cm" draw:z-index="9"><draw:image xlink:href="Pictures/1000000100000088000000230E147837.png" xlink:type="simple" xlink:show="embed" xlink:actuate="onLoad" draw:mime-type="image/png"/></draw:frame></text:p>
      <text:p text:style-name="P7">Тестирование триггера:</text:p>
      <text:p text:style-name="P14"><text:span text:style-name="T4"/></text:p>
      <text:p text:style-name="P14" loext:marker-style-name="T2"><text:span text:style-name="T3">DELETE FROM laba.route WHERE id_route = 1;</text:span><text:span text:style-name="T3"/></text:p>
      <text:p text:style-name="P16" loext:marker-style-name="T2"/>
      <text:p text:style-name="P14"><text:span text:style-name="T4"/></text:p>
      <text:p text:style-name="P14" loext:marker-style-name="T2"><text:span text:style-name="T3">INSERT INTO laba.route (id_route, inn, departure_point, destination_point,</text:span><text:span text:style-name="T3"/></text:p>
      <text:p text:style-name="P14" loext:marker-style-name="T2"><text:span text:style-name="T3"><text:s text:c="4"/>departure_time, arrival_time)</text:span><text:span text:style-name="T3"/></text:p>
      <text:p text:style-name="P14" loext:marker-style-name="T2"><text:span text:style-name="T3">VALUES (99, 9999, '</text:span><text:span text:style-name="T4">Тест</text:span><text:span text:style-name="T3">', '</text:span><text:span text:style-name="T4">Тест</text:span><text:span text:style-name="T3">2', '10:00:00', '12:00:00');</text:span></text:p>
      <text:p text:style-name="P16" loext:marker-style-name="T2"/>
      <text:p text:style-name="P14" loext:marker-style-name="T2"><text:span text:style-name="T3">DELETE FROM laba.route WHERE id_route = 99;</text:span><text:span text:style-name="T3"/></text:p>
      <text:p text:style-name="P14" loext:marker-style-name="T2"><text:span text:style-name="T3">SELECT * FROM laba.route WHERE id_route = 99; -- </text:span><text:span text:style-name="T4">пустой</text:span><text:span text:style-name="T3"> </text:span><text:span text:style-name="T4">результат</text:span></text:p>
      <text:p text:style-name="P12"><text:span text:style-name="T5">[</text:span></text:p>
      <text:p text:style-name="Standard"><draw:frame draw:style-name="fr2" draw:name="Изображение11" text:anchor-type="char" svg:width="16.501cm" svg:height="2.596cm" draw:z-index="10"><draw:image xlink:href="Pictures/100000010000039F00000092FE689C32.png" xlink:type="simple" xlink:show="embed" xlink:actuate="onLoad" draw:mime-type="image/png"/></draw:frame></text:p>
      <text:h text:style-name="Heading_20_3" text:outline-level="3">Триггер 4: Аудит изменений данных пассажиров</text:h>
      <text:p text:style-name="P7">Описание: Триггер срабатывает после любого изменения (INSERT, UPDATE, DELETE) в таблице passenger. Все изменения фиксируются в таблице аудита passenger_audit с указанием типа операции, идентификатора пассажира, имени и времени изменения.</text:p>
      <text:p text:style-name="P7">Скрипт создания триггерной функции и триггера:</text:p>
      <text:p text:style-name="P14"><text:span text:style-name="T4"/></text:p>
      <text:p text:style-name="P14" loext:marker-style-name="T2"><text:span text:style-name="T3">CREATE TABLE IF NOT EXISTS laba.passenger_audit (</text:span><text:span text:style-name="T3"/></text:p>
      <text:p text:style-name="P14" loext:marker-style-name="T2"><text:span text:style-name="T3"><text:s text:c="4"/>id <text:s text:c="9"/>SERIAL PRIMARY KEY,</text:span><text:span text:style-name="T3"/></text:p>
      <text:p text:style-name="P14" loext:marker-style-name="T2"><text:span text:style-name="T3"><text:s text:c="4"/>action <text:s text:c="5"/>VARCHAR(10) <text:s/>NOT NULL,</text:span><text:span text:style-name="T3"/></text:p>
      <text:p text:style-name="P14" loext:marker-style-name="T2"><text:span text:style-name="T3"><text:s text:c="4"/>passenger_id INTEGER,</text:span><text:span text:style-name="T3"/></text:p>
      <text:p text:style-name="P14" loext:marker-style-name="T2"><text:span text:style-name="T3"><text:s text:c="4"/>full_name <text:s text:c="2"/>VARCHAR(255),</text:span><text:span text:style-name="T3"/></text:p>
      <text:p text:style-name="P14" loext:marker-style-name="T2"><text:span text:style-name="T3"><text:s text:c="4"/>changed_at <text:s/>TIMESTAMP <text:s text:c="3"/>NOT NULL DEFAULT NOW()</text:span><text:span text:style-name="T3"/></text:p>
      <text:p text:style-name="P14" loext:marker-style-name="T2"><text:span text:style-name="T3">);</text:span><text:span text:style-name="T3"/></text:p>
      <text:p text:style-name="P16" loext:marker-style-name="T2"/>
      <text:p text:style-name="P14" loext:marker-style-name="T2"><text:span text:style-name="T3">CREATE OR REPLACE FUNCTION laba.fn_passenger_audit()</text:span><text:span text:style-name="T3"/></text:p>
      <text:p text:style-name="P14" loext:marker-style-name="T2"><text:span text:style-name="T3">RETURNS TRIGGER AS $$</text:span><text:span text:style-name="T3"/></text:p>
      <text:p text:style-name="P14" loext:marker-style-name="T2"><text:soft-page-break/><text:span text:style-name="T3">BEGIN</text:span><text:span text:style-name="T3"/></text:p>
      <text:p text:style-name="P14" loext:marker-style-name="T2"><text:span text:style-name="T3"><text:s text:c="4"/>IF TG_OP = 'INSERT' THEN</text:span><text:span text:style-name="T3"/></text:p>
      <text:p text:style-name="P14" loext:marker-style-name="T2"><text:span text:style-name="T3"><text:s text:c="8"/>INSERT INTO laba.passenger_audit (action, passenger_id, full_name)</text:span><text:span text:style-name="T3"/></text:p>
      <text:p text:style-name="P14" loext:marker-style-name="T2"><text:span text:style-name="T3"><text:s text:c="8"/>VALUES ('INSERT', NEW.id_passenger, NEW.full_name);</text:span><text:span text:style-name="T3"/></text:p>
      <text:p text:style-name="P14" loext:marker-style-name="T2"><text:span text:style-name="T3"><text:s text:c="8"/>RETURN NEW;</text:span><text:span text:style-name="T3"/></text:p>
      <text:p text:style-name="P16" loext:marker-style-name="T2"/>
      <text:p text:style-name="P14" loext:marker-style-name="T2"><text:span text:style-name="T3"><text:s text:c="4"/>ELSIF TG_OP = 'UPDATE' THEN</text:span><text:span text:style-name="T3"/></text:p>
      <text:p text:style-name="P14" loext:marker-style-name="T2"><text:span text:style-name="T3"><text:s text:c="8"/>INSERT INTO laba.passenger_audit (action, passenger_id, full_name)</text:span><text:span text:style-name="T3"/></text:p>
      <text:p text:style-name="P14" loext:marker-style-name="T2"><text:span text:style-name="T3"><text:s text:c="8"/>VALUES ('UPDATE', NEW.id_passenger,</text:span><text:span text:style-name="T3"/></text:p>
      <text:p text:style-name="P14" loext:marker-style-name="T2"><text:span text:style-name="T3"><text:s text:c="16"/>'</text:span><text:span text:style-name="T4">было</text:span><text:span text:style-name="T3">: ' || OLD.full_name || ' -&gt; </text:span><text:span text:style-name="T4">стало</text:span><text:span text:style-name="T3">: ' || NEW.full_name);</text:span></text:p>
      <text:p text:style-name="P14" loext:marker-style-name="T2"><text:span text:style-name="T3"><text:s text:c="8"/>RETURN NEW;</text:span><text:span text:style-name="T3"/></text:p>
      <text:p text:style-name="P16" loext:marker-style-name="T2"/>
      <text:p text:style-name="P14" loext:marker-style-name="T2"><text:span text:style-name="T3"><text:s text:c="4"/>ELSIF TG_OP = 'DELETE' THEN</text:span><text:span text:style-name="T3"/></text:p>
      <text:p text:style-name="P14" loext:marker-style-name="T2"><text:span text:style-name="T3"><text:s text:c="8"/>INSERT INTO laba.passenger_audit (action, passenger_id, full_name)</text:span><text:span text:style-name="T3"/></text:p>
      <text:p text:style-name="P14" loext:marker-style-name="T2"><text:span text:style-name="T3"><text:s text:c="8"/>VALUES ('DELETE', OLD.id_passenger, OLD.full_name);</text:span><text:span text:style-name="T3"/></text:p>
      <text:p text:style-name="P14" loext:marker-style-name="T2"><text:span text:style-name="T3"><text:s text:c="8"/>RETURN OLD;</text:span><text:span text:style-name="T3"/></text:p>
      <text:p text:style-name="P14" loext:marker-style-name="T2"><text:span text:style-name="T3"><text:s text:c="4"/>END IF;</text:span><text:span text:style-name="T3"/></text:p>
      <text:p text:style-name="P14" loext:marker-style-name="T2"><text:span text:style-name="T3">END;</text:span><text:span text:style-name="T3"/></text:p>
      <text:p text:style-name="P14" loext:marker-style-name="T2"><text:span text:style-name="T3">$$ LANGUAGE plpgsql;</text:span><text:span text:style-name="T3"/></text:p>
      <text:p text:style-name="P16" loext:marker-style-name="T2"/>
      <text:p text:style-name="P14" loext:marker-style-name="T2"><text:span text:style-name="T3">CREATE TRIGGER trg_passenger_audit</text:span><text:span text:style-name="T3"/></text:p>
      <text:p text:style-name="P14" loext:marker-style-name="T2"><text:span text:style-name="T3">AFTER INSERT OR UPDATE OR DELETE ON laba.passenger</text:span><text:span text:style-name="T3"/></text:p>
      <text:p text:style-name="P14" loext:marker-style-name="T2"><text:span text:style-name="T3">FOR EACH ROW EXECUTE PROCEDURE laba.fn_passenger_audit();</text:span><text:span text:style-name="T3"/></text:p>
      <text:p text:style-name="P12"><draw:frame draw:style-name="fr1" draw:name="Изображение12" text:anchor-type="char" svg:width="6.269cm" svg:height="1.693cm" draw:z-index="11"><draw:image xlink:href="Pictures/10000001000000ED0000004023D783DB.png" xlink:type="simple" xlink:show="embed" xlink:actuate="onLoad" draw:mime-type="image/png"/></draw:frame></text:p>
      <text:p text:style-name="P12"/>
      <text:p text:style-name="P12"/>
      <text:p text:style-name="P7" loext:marker-style-name="T2">Тестирование<text:span text:style-name="T2"> </text:span>триггера<text:span text:style-name="T2">:</text:span></text:p>
      <text:p text:style-name="P14" loext:marker-style-name="T2"><text:span text:style-name="T4"/></text:p>
      <text:p text:style-name="P14" loext:marker-style-name="T2"><text:span text:style-name="T3">INSERT INTO laba.passenger (id_passenger, id_passport, full_name, reg_address, email)</text:span><text:span text:style-name="T3"/></text:p>
      <text:p text:style-name="P15">VALUES (10, 1, 'Тестов Тест Тестович', 'Тест', 'test@test.ru');</text:p>
      <text:p text:style-name="P14"/>
      <text:p text:style-name="P14"><text:span text:style-name="T4"/></text:p>
      <text:p text:style-name="P15">UPDATE laba.passenger SET full_name = 'Тестов Тест Иванович' WHERE id_passenger = 10;</text:p>
      <text:p text:style-name="P14"/>
      <text:p text:style-name="P14" loext:marker-style-name="T2"><text:span text:style-name="T4"/></text:p>
      <text:p text:style-name="P14" loext:marker-style-name="T2"><text:span text:style-name="T3">DELETE FROM laba.passenger WHERE id_passenger = 10;</text:span><text:span text:style-name="T3"/></text:p>
      <text:p text:style-name="P16" loext:marker-style-name="T2"/>
      <text:p text:style-name="P14" loext:marker-style-name="T2"><text:span text:style-name="T4"/></text:p>
      <text:p text:style-name="P14" loext:marker-style-name="T4"><text:span text:style-name="T3">SELECT * FROM laba.passenger_audit ORDER BY id DESC LIMIT 5;</text:span><text:span text:style-name="T3"/></text:p>
      <text:p text:style-name="P14"><draw:frame draw:style-name="fr2" draw:name="Изображение13" text:anchor-type="char" svg:width="16.501cm" svg:height="2.401cm" draw:z-index="12"><draw:image xlink:href="Pictures/100000010000047B000000A73C729FBE.png" xlink:type="simple" xlink:show="embed" xlink:actuate="onLoad" draw:mime-type="image/png"/></draw:frame></text:p>
      <text:p text:style-name="Standard"><text:soft-page-break/><text:tab/></text:p>
      <text:h text:style-name="Heading_20_3" text:outline-level="3">Триггер 5: Автоматическое определение статуса рейса</text:h>
      <text:p text:style-name="P7">Триггер срабатывает перед вставкой или обновлением в таблице trip. Автоматически устанавливает статус рейса в зависимости от даты отправления: 'completed' - если дата прошла, 'active' - если сегодня, 'scheduled' - если в будущем.</text:p>
      <text:p text:style-name="P7">Скрипт создания триггерной функции и триггера:</text:p>
      <text:p text:style-name="P14"><text:span text:style-name="T3"/></text:p>
      <text:p text:style-name="P16" loext:marker-style-name="T2"/>
      <text:p text:style-name="P14" loext:marker-style-name="T2"><text:span text:style-name="T3">CREATE OR REPLACE FUNCTION laba.fn_auto_trip_status()</text:span><text:span text:style-name="T3"/></text:p>
      <text:p text:style-name="P15">RETURNS TRIGGER AS $$</text:p>
      <text:p text:style-name="P15">BEGIN</text:p>
      <text:p text:style-name="P14"><text:span text:style-name="T4"/></text:p>
      <text:p text:style-name="P14" loext:marker-style-name="T2"><text:span text:style-name="T4"><text:s text:c="4"/></text:span><text:span text:style-name="T3">IF NEW.planned_date &lt; CURRENT_DATE THEN</text:span></text:p>
      <text:p text:style-name="P14" loext:marker-style-name="T2"><text:span text:style-name="T3"><text:s text:c="8"/>NEW.status_trip := 'completed';</text:span><text:span text:style-name="T3"/></text:p>
      <text:p text:style-name="P14" loext:marker-style-name="T2"><text:span text:style-name="T3"><text:s text:c="4"/>ELSIF NEW.planned_date = CURRENT_DATE THEN</text:span><text:span text:style-name="T3"/></text:p>
      <text:p text:style-name="P14" loext:marker-style-name="T2"><text:span text:style-name="T3"><text:s text:c="8"/>NEW.status_trip := 'active';</text:span><text:span text:style-name="T3"/></text:p>
      <text:p text:style-name="P14" loext:marker-style-name="T2"><text:span text:style-name="T3"><text:s text:c="4"/>ELSE</text:span><text:span text:style-name="T3"/></text:p>
      <text:p text:style-name="P14" loext:marker-style-name="T2"><text:span text:style-name="T3"><text:s text:c="8"/>NEW.status_trip := 'scheduled';</text:span><text:span text:style-name="T3"/></text:p>
      <text:p text:style-name="P14"><text:span text:style-name="T3"><text:s text:c="4"/></text:span><text:span text:style-name="T4">END IF;</text:span></text:p>
      <text:p text:style-name="P14"/>
      <text:p text:style-name="P15"><text:s text:c="4"/>RAISE NOTICE 'Рейс id=% автоматически получил статус: %',</text:p>
      <text:p text:style-name="P14" loext:marker-style-name="T2"><text:span text:style-name="T4"><text:s text:c="8"/></text:span><text:span text:style-name="T3">NEW.id_trip, NEW.status_trip;</text:span></text:p>
      <text:p text:style-name="P16" loext:marker-style-name="T2"/>
      <text:p text:style-name="P14" loext:marker-style-name="T2"><text:span text:style-name="T3"><text:s text:c="4"/>RETURN NEW;</text:span><text:span text:style-name="T3"/></text:p>
      <text:p text:style-name="P14" loext:marker-style-name="T2"><text:span text:style-name="T3">END;</text:span><text:span text:style-name="T3"/></text:p>
      <text:p text:style-name="P14" loext:marker-style-name="T2"><text:span text:style-name="T3">$$ LANGUAGE plpgsql;</text:span><text:span text:style-name="T3"/></text:p>
      <text:p text:style-name="P16" loext:marker-style-name="T2"/>
      <text:p text:style-name="P14" loext:marker-style-name="T2"><text:span text:style-name="T3">CREATE TRIGGER trg_auto_trip_status</text:span><text:span text:style-name="T3"/></text:p>
      <text:p text:style-name="P14" loext:marker-style-name="T2"><text:span text:style-name="T3">BEFORE INSERT OR UPDATE ON laba.trip</text:span><text:span text:style-name="T3"/></text:p>
      <text:p text:style-name="P14" loext:marker-style-name="T2"><text:span text:style-name="T3">FOR EACH ROW EXECUTE PROCEDURE laba.fn_auto_trip_status();</text:span><text:span text:style-name="T3"/></text:p>
      <text:p text:style-name="P7"><draw:frame draw:style-name="fr1" draw:name="Изображение14" text:anchor-type="char" svg:width="5.369cm" svg:height="1.693cm" draw:z-index="13"><draw:image xlink:href="Pictures/10000001000000CB0000004009AEA7B3.png" xlink:type="simple" xlink:show="embed" xlink:actuate="onLoad" draw:mime-type="image/png"/></draw:frame></text:p>
      <text:p text:style-name="P17"/>
      <text:p text:style-name="P17"/>
      <text:p text:style-name="P17">Тестирование триггера:</text:p>
      <text:p text:style-name="P14"><text:span text:style-name="T4"/></text:p>
      <text:p text:style-name="P14" loext:marker-style-name="T2"><text:span text:style-name="T3">INSERT INTO laba.trip (id_trip, id_route, status_trip, planned_date, planned_arrival_date)</text:span><text:span text:style-name="T3"/></text:p>
      <text:p text:style-name="P14" loext:marker-style-name="T2"><text:span text:style-name="T3">VALUES (50, 1, 'scheduled', '2025-01-01', '2025-01-02');</text:span><text:span text:style-name="T3"/></text:p>
      <text:p text:style-name="P16" loext:marker-style-name="T2"/>
      <text:p text:style-name="P14" loext:marker-style-name="T2"><text:span text:style-name="T3">SELECT id_trip, status_trip, planned_date FROM laba.trip WHERE id_trip = 50;</text:span><text:span text:style-name="T3"/></text:p>
      <text:p text:style-name="P14"><text:span text:style-name="T4"/></text:p>
      <text:p text:style-name="P14"><text:span text:style-name="T4"/></text:p>
      <text:p text:style-name="P14" loext:marker-style-name="T2"><text:soft-page-break/><text:span text:style-name="T3">INSERT INTO laba.trip (id_trip, id_route, status_trip, planned_date, planned_arrival_date)</text:span><text:span text:style-name="T3"/></text:p>
      <text:p text:style-name="P14" loext:marker-style-name="T2"><text:span text:style-name="T3">VALUES (51, 1, 'active', CURRENT_DATE + 5, CURRENT_DATE + 6);</text:span><text:span text:style-name="T3"/></text:p>
      <text:p text:style-name="P16" loext:marker-style-name="T2"/>
      <text:p text:style-name="P14" loext:marker-style-name="T2"><text:span text:style-name="T3">SELECT id_trip, status_trip, planned_date FROM laba.trip WHERE id_trip = 51;</text:span><text:span text:style-name="T3"/></text:p>
      <text:p text:style-name="P14"><text:span text:style-name="T4"/></text:p>
      <text:p text:style-name="Standard"><draw:frame draw:style-name="fr2" draw:name="Изображение15" text:anchor-type="char" svg:width="16.501cm" svg:height="7.789cm" draw:z-index="14"><draw:image xlink:href="Pictures/10000001000002CC000001521CA1B6B4.png" xlink:type="simple" xlink:show="embed" xlink:actuate="onLoad" draw:mime-type="image/png"/></draw:frame></text:p>
      <text:h text:style-name="Heading_20_1" text:outline-level="1">4 <text:s/>Выводы</text:h>
      <text:p text:style-name="P7">В ходе выполнения лабораторной работы были получены практические навыки создания и использования хранимых процедур и триггеров в СУБД PostgreSQL.</text:p>
      <text:p text:style-name="P7">Разработаны три хранимые процедуры для базы данных «Пассажир»: процедура повышения цен на билеты пригородных маршрутов на 20%, процедура создания нового рейса с проверкой корректности входных данных, а также процедура формирования отчёта по выручке за сутки с детализацией по маршрутам.</text:p>
      <text:p text:style-name="P7">Разработаны пять оригинальных триггеров: триггер проверки и автоматической корректировки цены билета при предварительной продаже; триггер синхронизации статуса места в составе поезда при продаже и отмене билетов; триггер защиты от удаления маршрута при наличии активных рейсов; триггер аудита изменений данных пассажиров; триггер автоматической установки статуса рейса на основе даты отправления.</text:p>
      <text:p text:style-name="P7">Использование триггеров позволяет обеспечить целостность данных и автоматизировать бизнес-логику на уровне базы данных без дополнительного кода в приложении.</text:p>
      <text:h text:style-name="Heading_20_1" text:outline-level="1"><text:soft-page-break/>5 <text:s/>Список источников</text:h>
      <text:list text:style-name="WWNum3">
        <text:list-item text:start-value="1">
          <text:p text:style-name="P18">Документация PostgreSQL. Процедуры [Электронный ресурс] // Официальный сайт PostgresPro. URL: https://postgrespro.ru/docs/postgresql/11/sql-createprocedure (дата обращения: <text:span text:style-name="T6">10.06.2026</text:span>).</text:p>
        </text:list-item>
        <text:list-item>
          <text:p text:style-name="P19">Документация PostgreSQL. Функции [Электронный ресурс] // Официальный сайт PostgresPro. URL: https://postgrespro.ru/docs/postgresql/11/sql-createfunction (дата обращения: 1<text:span text:style-name="T6">0.06.2026</text:span>).</text:p>
        </text:list-item>
        <text:list-item>
          <text:p text:style-name="P19">Документация PostgreSQL. Триггеры [Электронный ресурс] // Официальный сайт PostgresPro. URL: https://postgrespro.ru/docs/postgresql/9.6/plpgsql-trigger (дата обращения: 1<text:span text:style-name="T6">0.06.2026</text:span>).</text:p>
          <text:p text:style-name="P1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default-outline-level="1" style:list-style-name="" style:class="chapter">
      <style:paragraph-properties fo:margin-top="0.423cm" fo:margin-bottom="0.212cm" style:contextual-spacing="false" fo:text-align="left" style:justify-single-word="false" fo:orphans="2" fo:widows="2" style:writing-mode="lr-tb"/>
      <style:text-properties fo:font-weight="bold" style:font-weight-asian="bold" style:font-weight-complex="bold"/>
    </style:style>
    <style:style style:name="Heading_20_2" style:display-name="Heading 2" style:family="paragraph" style:default-outline-level="2" style:list-style-name="" style:class="chapter">
      <style:paragraph-properties fo:margin-top="0.353cm" fo:margin-bottom="0.176cm" style:contextual-spacing="false" fo:text-align="left" style:justify-single-word="false" fo:orphans="2" fo:widows="2" style:writing-mode="lr-tb"/>
      <style:text-properties fo:font-weight="bold" style:font-weight-asian="bold" style:font-weight-complex="bold"/>
    </style:style>
    <style:style style:name="Heading_20_3" style:display-name="Heading 3" style:family="paragraph" style:default-outline-level="3" style:list-style-name="" style:class="chapter">
      <style:paragraph-properties fo:margin-top="0.282cm" fo:margin-bottom="0.141cm" style:contextual-spacing="false" fo:text-align="left" style:justify-single-word="false" fo:orphans="2" fo:widows="2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default-outline-level="4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font-size="28pt" style:font-size-asian="28pt" style:font-size-complex="28pt"/>
    </style:style>
    <style:style style:name="Строгий1" style:family="paragraph">
      <style:paragraph-properties fo:margin-top="0cm" fo:margin-bottom="0cm" style:contextual-spacing="false" fo:text-align="lef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2" fo:widows="2" style:writing-mode="lr-tb"/>
    </style:style>
    <style:style style:name="Footnote" style:family="paragraph" loext:linked-style-name="Текст_20_сноски_20_Знак" style:class="extra">
      <style:paragraph-properties fo:margin-top="0cm" fo:margin-bottom="0cm" style:contextual-spacing="false" fo:text-align="left" style:justify-single-word="false" fo:orphans="2" fo:widows="2" style:writing-mode="lr-tb"/>
      <style:text-properties fo:font-size="10pt" style:font-size-asian="10pt" style:font-size-complex="10pt"/>
    </style:style>
    <style:style style:name="Endnote" style:family="paragraph" loext:linked-style-name="Текст_20_концевой_20_сноски_20_Знак" style:class="extra">
      <style:paragraph-properties fo:margin-top="0cm" fo:margin-bottom="0cm" style:contextual-spacing="false" fo:text-align="left" style:justify-single-word="false" fo:orphans="2" fo:widows="2" style:writing-mode="lr-tb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5</meta:editing-cycles>
    <meta:creation-date>2026-06-17T03:35:00</meta:creation-date>
    <dc:date>2026-06-26T15:00:13.222212126</dc:date>
    <meta:editing-duration>PT1H1M56S</meta:editing-duration>
    <meta:generator>LibreOffice/26.2.3.2$Linux_X86_64 LibreOffice_project/620$Build-2</meta:generator>
    <meta:document-statistic meta:table-count="0" meta:image-count="15" meta:object-count="0" meta:page-count="15" meta:paragraph-count="334" meta:word-count="1811" meta:character-count="15307" meta:non-whitespace-character-count="12769"/>
    <meta:user-defined meta:name="AppVersion">16.0000</meta:user-defined>
    <meta:template xlink:type="simple" xlink:actuate="onRequest" xlink:title="Normal.dotm" xlink:href=""/>
  </office:meta>
</office:document-meta>
</file>