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C00000026DA3BAC01.png" manifest:media-type="image/png"/>
  <manifest:file-entry manifest:full-path="Pictures/100000010000031C000000E490D9516F.png" manifest:media-type="image/png"/>
  <manifest:file-entry manifest:full-path="Pictures/10000001000002EA0000008C7BE8091A.png" manifest:media-type="image/png"/>
  <manifest:file-entry manifest:full-path="Pictures/10000001000001CE000000246F57FCD0.png" manifest:media-type="image/png"/>
  <manifest:file-entry manifest:full-path="Pictures/10000001000004C6000001183EDDB5E7.png" manifest:media-type="image/png"/>
  <manifest:file-entry manifest:full-path="Pictures/100000010000054A000000B2EDC0B7BA.png" manifest:media-type="image/png"/>
  <manifest:file-entry manifest:full-path="Pictures/100000010000044600000064A036BC4D.png" manifest:media-type="image/png"/>
  <manifest:file-entry manifest:full-path="Pictures/100000010000036C0000004E7A38BB3B.png" manifest:media-type="image/png"/>
  <manifest:file-entry manifest:full-path="Pictures/1000000100000914000000B4394EA4C0.png" manifest:media-type="image/png"/>
  <manifest:file-entry manifest:full-path="Pictures/1000000100000400000001C2F364EFEA.png" manifest:media-type="image/png"/>
  <manifest:file-entry manifest:full-path="Pictures/100000010000043A0000011A2AD79FB1.png" manifest:media-type="image/png"/>
  <manifest:file-entry manifest:full-path="Pictures/100000010000022C000000E4D6FEF5D9.png" manifest:media-type="image/png"/>
  <manifest:file-entry manifest:full-path="Pictures/100000010000030A0000013889A52C1E.png" manifest:media-type="image/png"/>
  <manifest:file-entry manifest:full-path="Pictures/10000001000000C8000000684588FAAF.png" manifest:media-type="image/png"/>
  <manifest:file-entry manifest:full-path="Pictures/100000010000041800000118648A670D.png" manifest:media-type="image/png"/>
  <manifest:file-entry manifest:full-path="Pictures/1000000100000232000000FCB42335B1.png" manifest:media-type="image/png"/>
  <manifest:file-entry manifest:full-path="Pictures/10000001000004600000014CC9781A2D.png" manifest:media-type="image/png"/>
  <manifest:file-entry manifest:full-path="Pictures/10000001000003A2000000902F23C361.png" manifest:media-type="image/png"/>
  <manifest:file-entry manifest:full-path="Pictures/100000010000086C000000820818CFBC.png" manifest:media-type="image/png"/>
  <manifest:file-entry manifest:full-path="Pictures/1000000100000226000006B2607849DB.png" manifest:media-type="image/png"/>
  <manifest:file-entry manifest:full-path="Pictures/100000010000042A000000FAE8739972.png" manifest:media-type="image/png"/>
  <manifest:file-entry manifest:full-path="Pictures/10000001000008C4000001C2542F1C09.png" manifest:media-type="image/png"/>
  <manifest:file-entry manifest:full-path="Pictures/10000001000000F40000003098B3DCF8.png" manifest:media-type="image/png"/>
  <manifest:file-entry manifest:full-path="Pictures/100000010000024C00000048539DB517.png" manifest:media-type="image/png"/>
  <manifest:file-entry manifest:full-path="Pictures/1000000100000260000000FE2F9E1AC7.png" manifest:media-type="image/png"/>
  <manifest:file-entry manifest:full-path="Pictures/1000000100000272000001781C2FB1BC.png" manifest:media-type="image/png"/>
  <manifest:file-entry manifest:full-path="Pictures/1000000100000372000000DE9BB36E09.png" manifest:media-type="image/png"/>
  <manifest:file-entry manifest:full-path="Pictures/10000001000001F200000070DB7D149E.png" manifest:media-type="image/png"/>
  <manifest:file-entry manifest:full-path="Pictures/100000010000026A000000F463210DC9.png" manifest:media-type="image/png"/>
  <manifest:file-entry manifest:full-path="Pictures/100000010000044400000342F229F04E.png" manifest:media-type="image/png"/>
  <manifest:file-entry manifest:full-path="Pictures/10000001000003AA00000618948D5B01.png" manifest:media-type="image/png"/>
  <manifest:file-entry manifest:full-path="Pictures/10000001000000EC0000003E166FCD42.png" manifest:media-type="image/png"/>
  <manifest:file-entry manifest:full-path="Pictures/10000001000002AA0000025684F54238.png" manifest:media-type="image/png"/>
  <manifest:file-entry manifest:full-path="Pictures/10000001000004A0000000C6CBF76DAB.png" manifest:media-type="image/png"/>
  <manifest:file-entry manifest:full-path="Pictures/10000001000003760000012628A2DA2E.png" manifest:media-type="image/png"/>
  <manifest:file-entry manifest:full-path="Pictures/10000001000002A4000000DCADAF6176.png" manifest:media-type="image/png"/>
  <manifest:file-entry manifest:full-path="Pictures/100000010000046C0000034AE0FFBADC.png" manifest:media-type="image/png"/>
  <manifest:file-entry manifest:full-path="Pictures/100000010000026A00000118551EFC62.png" manifest:media-type="image/png"/>
  <manifest:file-entry manifest:full-path="Pictures/100000010000043600000498148E9706.png" manifest:media-type="image/png"/>
  <manifest:file-entry manifest:full-path="Pictures/1000000100000396000000367DA7E0F5.png" manifest:media-type="image/png"/>
  <manifest:file-entry manifest:full-path="Pictures/10000001000001A0000000B46BABE5FA.png" manifest:media-type="image/png"/>
  <manifest:file-entry manifest:full-path="Pictures/100000010000028E000000F6A4B90C55.png" manifest:media-type="image/png"/>
  <manifest:file-entry manifest:full-path="Pictures/10000001000002740000007A6E3F1A12.png" manifest:media-type="image/png"/>
  <manifest:file-entry manifest:full-path="Pictures/1000000100000270000000EC14AB64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.002cm" fo:margin-top="0cm" fo:margin-bottom="0cm" table:align="left" style:writing-mode="page"/>
    </style:style>
    <style:style style:name="Таблица1.A" style:family="table-column">
      <style:table-column-properties style:column-width="7.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212cm" fo:padding-right="0.212cm" fo:padding-top="0.141cm" fo:padding-bottom="0.141cm" fo:border="0.1pt solid #000000">
        <style:background-image/>
      </style:table-cell-properties>
    </style:style>
    <style:style style:name="Таблица1.A2" style:family="table-cell">
      <style:table-cell-properties fo:background-color="#ffffff" fo:padding-left="0.212cm" fo:padding-right="0.212cm" fo:padding-top="0.141cm" fo:padding-bottom="0.141cm" fo:border="0.1pt solid #000000">
        <style:background-image/>
      </style:table-cell-properties>
    </style:style>
    <style:style style:name="P1" style:family="paragraph" style:parent-style-name="Standard">
      <style:paragraph-properties fo:margin-top="0.353cm" fo:margin-bottom="0.212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.212cm" style:contextual-spacing="false" fo:text-align="right" style:justify-single-word="false"/>
    </style:style>
    <style:style style:name="P5" style:family="paragraph" style:parent-style-name="Heading_20_1">
      <style:paragraph-properties fo:margin-top="0cm" fo:margin-bottom="0.212cm" style:contextual-spacing="false" fo:break-before="page"/>
    </style:style>
    <style:style style:name="P6" style:family="paragraph" style:parent-style-name="Standard">
      <style:paragraph-properties fo:margin-top="0cm" fo:margin-bottom="0.212cm" style:contextual-spacing="false" fo:line-height="115%" fo:text-align="justify" style:justify-single-word="false" fo:text-indent="1.27cm" style:auto-text-indent="false" loext:word-spacing-minimum="75%" loext:word-spacing-maximum="133%"/>
    </style:style>
    <style:style style:name="P7" style:family="paragraph" style:parent-style-name="List_20_Paragraph" style:list-style-name="WWNum2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cm" fo:margin-bottom="0.071cm" style:contextual-spacing="false"/>
    </style:style>
    <style:style style:name="P9" style:family="paragraph" style:parent-style-name="Standard">
      <style:paragraph-properties fo:margin-top="0.141cm" fo:margin-bottom="0.141cm" style:contextual-spacing="false" fo:text-align="center" style:justify-single-word="false"/>
      <style:text-properties fo:language="en" fo:country="US"/>
    </style:style>
    <style:style style:name="P10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margin-top="0cm" fo:margin-bottom="0.071cm" style:contextual-spacing="false"/>
      <style:text-properties fo:language="en" fo:country="US"/>
    </style:style>
    <style:style style:name="P13" style:family="paragraph" style:parent-style-name="Standard">
      <style:paragraph-properties fo:margin-top="0.141cm" fo:margin-bottom="0.141cm" style:contextual-spacing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Heading_20_1">
      <style:paragraph-properties fo:margin-top="0.423cm" fo:margin-bottom="0.212cm" style:contextual-spacing="false"/>
    </style:style>
    <style:style style:name="P16" style:family="paragraph" style:parent-style-name="List_20_Paragraph" style:list-style-name="WWNum3">
      <style:paragraph-properties fo:margin-top="0cm" fo:margin-bottom="0.141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b4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5" style:family="text">
      <style:text-properties fo:language="en" fo:country="US"/>
    </style:style>
    <style:style style:name="T6" style:family="text">
      <style:text-properties fo:font-family="'Courier New'" style:font-family-generic="roman" style:font-pitch="variable" fo:font-size="10pt" fo:language="en" fo:country="US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7" style:family="text">
      <style:text-properties fo:color="#888888" loext:opacity="100%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3">САНКТ-ПЕТЕРБУРГСКИЙ ГОСУДАРСТВЕННЫЙ УНИВЕРСИТЕТ ИТМО</text:p>
      <text:p text:style-name="Standard"/>
      <text:p text:style-name="Standard"/>
      <text:p text:style-name="Standard"/>
      <text:p text:style-name="P2"><text:span text:style-name="T1">ОТЧЁТ</text:span></text:p>
      <text:p text:style-name="P2"><text:span text:style-name="T1">по лабораторной работе №6</text:span></text:p>
      <text:p text:style-name="P2"><text:span text:style-name="T1">Введение в СУБД MongoDB. Работа с БД в СУБД MongoDB</text:span></text:p>
      <text:p text:style-name="Standard"/>
      <text:p text:style-name="Standard"/>
      <text:p text:style-name="Standard"/>
      <text:p text:style-name="P4">Выполнил:<text:tab/><text:span text:style-name="T2">Ковалев Руслан Бабекович</text:span></text:p>
      <text:p text:style-name="P4">Группа:<text:tab/>K3242</text:p>
      <text:p text:style-name="Standard"/>
      <text:p text:style-name="Standard"/>
      <text:p text:style-name="Standard"/>
      <text:p text:style-name="P2">Санкт-Петербург ,<text:span text:style-name="T2">2026</text:span></text:p>
      <text:p text:style-name="Standard"/>
      <text:h text:style-name="P5" text:outline-level="1"><text:span text:style-name="T3">ЧАСТЬ 1. Введение в СУБД MongoDB. Установка MongoDB</text:span></text:h>
      <text:h text:style-name="Heading_20_2" text:outline-level="2">1.1 <text:s/>Цель работы</text:h>
      <text:p text:style-name="P6">Овладеть практическими навыками установки СУБД MongoDB.</text:p>
      <text:h text:style-name="Heading_20_2" text:outline-level="2">1.2 <text:s/>Практическое задание</text:h>
      <text:list text:style-name="WWNum2">
        <text:list-item text:start-value="1">
          <text:p text:style-name="P7">установить MongoDB для обеих типов систем (32/64 бита);</text:p>
        </text:list-item>
        <text:list-item>
          <text:p text:style-name="P7">проверить работоспособность системы запуском клиента mongo;</text:p>
        </text:list-item>
        <text:list-item>
          <text:p text:style-name="P7">выполнить методы db.help(), db.help, db.stats();</text:p>
        </text:list-item>
        <text:list-item>
          <text:p text:style-name="P7">создать БД learn;</text:p>
        </text:list-item>
        <text:list-item>
          <text:p text:style-name="P7">получить список доступных БД;</text:p>
        </text:list-item>
        <text:list-item>
          <text:p text:style-name="P7">создать коллекцию unicorns, вставив в неё документ {name: 'Aurora', gender: 'f', weight: 450};</text:p>
        </text:list-item>
        <text:list-item>
          <text:p text:style-name="P7">просмотреть список текущих коллекций;</text:p>
        </text:list-item>
        <text:list-item>
          <text:p text:style-name="P7">переименовать коллекцию unicorns;</text:p>
        </text:list-item>
        <text:list-item>
          <text:p text:style-name="P7">просмотреть статистику коллекции;</text:p>
        </text:list-item>
        <text:list-item>
          <text:p text:style-name="P7">удалить коллекцию;</text:p>
        </text:list-item>
        <text:list-item>
          <text:p text:style-name="P7">удалить БД learn</text:p>
        </text:list-item>
      </text:list>
      <text:h text:style-name="Heading_20_3" text:outline-level="3">Создание БД learn и просмотр списка БД</text:h>
      <text:p text:style-name="P6">В MongoDB отсутствует явная команда создания базы данных - она создаётся автоматически при первой записи документа в любую из её коллекций. Переключение на БД (с автоматическим созданием при первой вставке) выполняется командой use:</text:p>
      <text:p text:style-name="P8"><text:span text:style-name="T4">use learn</text:span></text:p>
      <text:p text:style-name="P9" loext:marker-style-name="T5"/>
      <text:p text:style-name="P6">Получение списка доступных баз данных:</text:p>
      <text:p text:style-name="P8"><text:span text:style-name="T4">show dbs</text:span></text:p>
      <text:p text:style-name="P6">Особенность MongoDB: пустая база данных (без коллекций с документами) не отображается в результате команды show dbs. БД появится в списке только после вставки первого документа.</text:p>
      <text:p text:style-name="Standard"/>
      <text:h text:style-name="Heading_20_3" text:outline-level="3">Создание коллекции unicorns</text:h>
      <text:p text:style-name="P6">Вставляем документ, который автоматически создаёт коллекцию unicorns:</text:p>
      <text:p text:style-name="P8" loext:marker-style-name="T5"><text:span text:style-name="T6">db.unicorns.insert({name: 'Aurora', gender: 'f', weight: 450})</text:span><text:span text:style-name="T6"/></text:p>
      <text:p text:style-name="P6">Повторно проверяем список БД - теперь learn отображается:</text:p>
      <text:p text:style-name="P8"><text:soft-page-break/><text:span text:style-name="T4">show dbs</text:span></text:p>
      <text:p text:style-name="Standard"><draw:frame draw:style-name="fr1" draw:name="Рисунок 1" text:anchor-type="as-char" svg:width="2.646cm" svg:height="1.376cm" draw:z-index="0"><draw:image xlink:href="Pictures/10000001000000C8000000684588FAAF.png" xlink:type="simple" xlink:show="embed" xlink:actuate="onLoad" draw:mime-type="image/png"/></draw:frame></text:p>
      <text:h text:style-name="Heading_20_3" text:outline-level="3">Просмотр списка коллекций</text:h>
      <text:p text:style-name="P8"><text:span text:style-name="T4">show collections</text:span></text:p>
      <text:p text:style-name="P8"><text:span text:style-name="T4">// либо альтернативный способ:</text:span></text:p>
      <text:p text:style-name="P8"><text:span text:style-name="T4">db.getCollectionNames()</text:span></text:p>
      <text:p text:style-name="Standard"><draw:frame draw:style-name="fr1" draw:name="Изображение2" text:anchor-type="as-char" svg:width="3.122cm" svg:height="0.82cm" draw:z-index="1"><draw:image xlink:href="Pictures/10000001000000EC0000003E166FCD42.png" xlink:type="simple" xlink:show="embed" xlink:actuate="onLoad" draw:mime-type="image/png"/></draw:frame></text:p>
      <text:h text:style-name="Heading_20_3" text:outline-level="3" loext:marker-style-name="T5">Переименование<text:span text:style-name="T5"> </text:span>коллекции</text:h>
      <text:p text:style-name="P8" loext:marker-style-name="T5"><text:span text:style-name="T6">db.unicorns.renameCollection("mythical_creatures")</text:span><text:span text:style-name="T6"/></text:p>
      <text:p text:style-name="P10" loext:marker-style-name="T5"><draw:frame draw:style-name="fr1" draw:name="Изображение3" text:anchor-type="as-char" svg:width="7.779cm" svg:height="0.953cm" draw:z-index="2"><draw:image xlink:href="Pictures/100000010000024C00000048539DB517.png" xlink:type="simple" xlink:show="embed" xlink:actuate="onLoad" draw:mime-type="image/png"/></draw:frame></text:p>
      <text:p text:style-name="P8"><text:span text:style-name="T4">show collections</text:span></text:p>
      <text:p text:style-name="Standard"><draw:frame draw:style-name="fr1" draw:name="Изображение4" text:anchor-type="as-char" svg:width="3.228cm" svg:height="0.635cm" draw:z-index="3"><draw:image xlink:href="Pictures/10000001000000F40000003098B3DCF8.png" xlink:type="simple" xlink:show="embed" xlink:actuate="onLoad" draw:mime-type="image/png"/></draw:frame></text:p>
      <text:h text:style-name="Heading_20_3" text:outline-level="3">Статистика коллекции</text:h>
      <text:p text:style-name="P8" loext:marker-style-name="T5"><text:span text:style-name="T4">db.mythical_creatures.stats()</text:span><text:span text:style-name="T6"/></text:p>
      <text:p text:style-name="Standard"/>
      <text:h text:style-name="Heading_20_3" text:outline-level="3">Удаление коллекции</text:h>
      <text:p text:style-name="P8"><text:span text:style-name="T4">db.mythical_creatures.drop()</text:span></text:p>
      <text:p text:style-name="P8"><text:span text:style-name="T4">show collections</text:span></text:p>
      <text:p text:style-name="P10"><text:span text:style-name="T7">[</text:span></text:p>
      <text:p text:style-name="Standard"/>
      <text:h text:style-name="Heading_20_3" text:outline-level="3" loext:marker-style-name="T5">Удаление<text:span text:style-name="T5"> </text:span>БД<text:span text:style-name="T5"> learn</text:span></text:h>
      <text:p text:style-name="P8" loext:marker-style-name="T5"><text:span text:style-name="T6">use learn</text:span><text:span text:style-name="T6"/></text:p>
      <text:p text:style-name="P8" loext:marker-style-name="T5"><text:span text:style-name="T6">db.dropDatabase()</text:span><text:span text:style-name="T6"/></text:p>
      <text:p text:style-name="P8" loext:marker-style-name="T5"><text:span text:style-name="T6">show dbs</text:span><text:span text:style-name="T6"/></text:p>
      <text:p text:style-name="P11" loext:marker-style-name="T5"/>
      <text:p text:style-name="Standard"/>
      <text:h text:style-name="P5" text:outline-level="1"><text:span text:style-name="T3">ЧАСТЬ 2. Работа с БД в СУБД MongoDB</text:span></text:h>
      <text:h text:style-name="Heading_20_2" text:outline-level="2">2.1 <text:s/>Цель работы</text:h>
      <text:p text:style-name="P6">Овладеть практическими навыками работы с CRUD-операциями, с вложенными объектами в коллекции базы данных MongoDB, агрегации и изменения данных, со ссылками и индексами в базе данных MongoDB.</text:p>
      <text:h text:style-name="Heading_20_2" text:outline-level="2">2.2 <text:s/>Практическое задание</text:h>
      <text:p text:style-name="P6">Выполнить практические задания по разделам: CRUD-операции (вставка, выборка данных), логические операторы, запросы к вложенным объектам, использование курсоров, агрегированные запросы, редактирование и удаление данных, ссылки между коллекциями, настройка и управление индексами, анализ плана запроса.</text:p>
      <text:h text:style-name="Heading_20_2" text:outline-level="2">2.3 <text:s/>Выполнение</text:h>
      <text:h text:style-name="Heading_20_3" text:outline-level="3">Задание 2.1.1 - Вставка документов в коллекцию</text:h>
      <text:p text:style-name="P6">Формулировка: создать базу данных learn, заполнить коллекцию unicorns документами (11 единорогов), вставить документ Dunx вторым способом (через переменную document), проверить содержимое коллекции с помощью find.</text:p>
      <text:p text:style-name="P8" loext:marker-style-name="T5"><text:span text:style-name="T6">use learn</text:span><text:span text:style-name="T6"/></text:p>
      <text:p text:style-name="P12" loext:marker-style-name="T5"/>
      <text:p text:style-name="P8" loext:marker-style-name="T5"><text:span text:style-name="T6">db.unicorns.insert({name: 'Horny', loves: ['carrot','papaya'], weight: 600, gender: 'm', vampires: 63});</text:span><text:span text:style-name="T6"/></text:p>
      <text:p text:style-name="P8" loext:marker-style-name="T5"><text:span text:style-name="T6">db.unicorns.insert({name: 'Aurora', loves: ['carrot', 'grape'], weight: 450, gender: 'f', vampires: 43});</text:span><text:span text:style-name="T6"/></text:p>
      <text:p text:style-name="P8" loext:marker-style-name="T5"><text:span text:style-name="T6">db.unicorns.insert({name: 'Unicrom', loves: ['energon', 'redbull'], weight: 984, gender: 'm', vampires: 182});</text:span><text:span text:style-name="T6"/></text:p>
      <text:p text:style-name="P8" loext:marker-style-name="T5"><text:span text:style-name="T6">db.unicorns.insert({name: 'Roooooodles', loves: ['apple'], weight: 575, gender: 'm', vampires: 99});</text:span><text:span text:style-name="T6"/></text:p>
      <text:p text:style-name="P8" loext:marker-style-name="T5"><text:span text:style-name="T6">db.unicorns.insert({name: 'Solnara', loves:['apple', 'carrot', 'chocolate'], weight:550, gender:'f', vampires:80});</text:span><text:span text:style-name="T6"/></text:p>
      <text:p text:style-name="P8" loext:marker-style-name="T5"><text:span text:style-name="T6">db.unicorns.insert({name:'Ayna', loves: ['strawberry', 'lemon'], weight: 733, gender: 'f', vampires: 40});</text:span><text:span text:style-name="T6"/></text:p>
      <text:p text:style-name="P8" loext:marker-style-name="T5"><text:span text:style-name="T6">db.unicorns.insert({name:'Kenny', loves: ['grape', 'lemon'], weight: 690, gender: 'm', vampires: 39});</text:span><text:span text:style-name="T6"/></text:p>
      <text:p text:style-name="P8" loext:marker-style-name="T5"><text:span text:style-name="T6">db.unicorns.insert({name: 'Raleigh', loves: ['apple', 'sugar'], weight: 421, gender: 'm', vampires: 2});</text:span><text:span text:style-name="T6"/></text:p>
      <text:p text:style-name="P8" loext:marker-style-name="T5"><text:span text:style-name="T6">db.unicorns.insert({name: 'Leia', loves: ['apple', 'watermelon'], weight: 601, gender: 'f', vampires: 33});</text:span><text:span text:style-name="T6"/></text:p>
      <text:p text:style-name="P8" loext:marker-style-name="T5"><text:span text:style-name="T6">db.unicorns.insert({name: 'Pilot', loves: ['apple', 'watermelon'], weight: 650, gender: 'm', vampires: 54});</text:span><text:span text:style-name="T6"/></text:p>
      <text:p text:style-name="P8" loext:marker-style-name="T5"><text:span text:style-name="T6">db.unicorns.insert({name: 'Nimue', loves: ['grape', 'carrot'], weight: 540, gender: 'f'});</text:span><text:span text:style-name="T6"/></text:p>
      <text:p text:style-name="P12" loext:marker-style-name="T5"/>
      <text:p text:style-name="Standard" loext:marker-style-name="T5"><text:soft-page-break/><draw:frame draw:style-name="fr1" draw:name="Изображение5" text:anchor-type="as-char" svg:width="16.501cm" svg:height="3.309cm" draw:z-index="4"><draw:image xlink:href="Pictures/10000001000008C4000001C2542F1C09.png" xlink:type="simple" xlink:show="embed" xlink:actuate="onLoad" draw:mime-type="image/png"/></draw:frame></text:p>
      <text:p text:style-name="Standard" loext:marker-style-name="T5"><draw:frame draw:style-name="fr1" draw:name="Изображение6" text:anchor-type="as-char" svg:width="6.639cm" svg:height="20.69cm" draw:z-index="5"><draw:image xlink:href="Pictures/1000000100000226000006B2607849DB.png" xlink:type="simple" xlink:show="embed" xlink:actuate="onLoad" draw:mime-type="image/png"/></draw:frame></text:p>
      <text:h text:style-name="Heading_20_3" text:outline-level="3"><text:soft-page-break/>Задание 2.2.1 - Выборка самцов/самок единорогов</text:h>
      <text:p text:style-name="P6">Формулировка: сформировать запросы для вывода списков самцов и самок единорогов. Ограничить список самок первыми тремя особями. Отсортировать списки по имени. Найти всех самок, которые любят carrot. Ограничить этот список первой особью с помощью функций findOne и limit.</text:p>
      <text:p text:style-name="P8"><text:span text:style-name="T4">// Список самцов, отсортированный по имени</text:span></text:p>
      <text:p text:style-name="P8" loext:marker-style-name="T6"><text:span text:style-name="T4">db.unicorns.find({gender: 'm'}).sort({name: 1})</text:span><text:span text:style-name="T6"/></text:p>
      <text:p text:style-name="P8" loext:marker-style-name="T5"><draw:frame draw:style-name="fr1" draw:name="Изображение7" text:anchor-type="as-char" svg:width="10.229cm" svg:height="17.013cm" draw:z-index="6"><draw:image xlink:href="Pictures/10000001000003AA00000618948D5B01.png" xlink:type="simple" xlink:show="embed" xlink:actuate="onLoad" draw:mime-type="image/png"/></draw:frame></text:p>
      <text:p text:style-name="P8"/>
      <text:p text:style-name="P8"><text:span text:style-name="T4">// Список самок, первые три, отсортированные по имени</text:span></text:p>
      <text:p text:style-name="P8" loext:marker-style-name="T6"><text:span text:style-name="T6">db.unicorns.find({gender: 'f'}).sort({name: 1}).limit(3</text:span><text:span text:style-name="T6"/></text:p>
      <text:p text:style-name="P8" loext:marker-style-name="T5"><text:soft-page-break/><draw:frame draw:style-name="fr1" draw:name="Изображение8" text:anchor-type="as-char" svg:width="14.446cm" svg:height="11.033cm" draw:z-index="7"><draw:image xlink:href="Pictures/100000010000044400000342F229F04E.png" xlink:type="simple" xlink:show="embed" xlink:actuate="onLoad" draw:mime-type="image/png"/></draw:frame><text:span text:style-name="T6">)</text:span></text:p>
      <text:p text:style-name="P12" loext:marker-style-name="T5"/>
      <text:p text:style-name="P8"><text:span text:style-name="T4">// Самки, которые любят carrot, через findOne</text:span></text:p>
      <text:p text:style-name="P8" loext:marker-style-name="T6"><text:span text:style-name="T6">db.unicorns.findOne({gender: 'f', loves: 'carrot'})</text:span><text:span text:style-name="T6"/></text:p>
      <text:p text:style-name="P8" loext:marker-style-name="T5"><draw:frame draw:style-name="fr1" draw:name="Изображение9" text:anchor-type="as-char" svg:width="13.864cm" svg:height="3.704cm" draw:z-index="8"><draw:image xlink:href="Pictures/100000010000041800000118648A670D.png" xlink:type="simple" xlink:show="embed" xlink:actuate="onLoad" draw:mime-type="image/png"/></draw:frame></text:p>
      <text:p text:style-name="P12" loext:marker-style-name="T5"/>
      <text:p text:style-name="P8" loext:marker-style-name="T5"><text:span text:style-name="T6">// </text:span><text:span text:style-name="T4">Тот</text:span><text:span text:style-name="T6"> </text:span><text:span text:style-name="T4">же</text:span><text:span text:style-name="T6"> </text:span><text:span text:style-name="T4">результат</text:span><text:span text:style-name="T6"> </text:span><text:span text:style-name="T4">через</text:span><text:span text:style-name="T6"> limit</text:span></text:p>
      <text:p text:style-name="P8" loext:marker-style-name="T6"><text:span text:style-name="T6">db.unicorns.find({gender: 'f', loves: 'carrot'}).limit(1)</text:span><text:span text:style-name="T6"/></text:p>
      <text:p text:style-name="P8" loext:marker-style-name="T5"><draw:frame draw:style-name="fr1" draw:name="Изображение10" text:anchor-type="as-char" svg:width="14.817cm" svg:height="4.392cm" draw:z-index="9"><draw:image xlink:href="Pictures/10000001000004600000014CC9781A2D.png" xlink:type="simple" xlink:show="embed" xlink:actuate="onLoad" draw:mime-type="image/png"/></draw:frame></text:p>
      <text:p text:style-name="Standard"/>
      <text:h text:style-name="Heading_20_3" text:outline-level="3">Задание 2.2.2 - Проекция полей (исключение из результата)</text:h>
      <text:p text:style-name="P6"><text:soft-page-break/>Формулировка: модифицировать запрос для вывода списков самцов единорогов, исключив из результата информацию о предпочтениях (loves) и поле идентификатора (_id).</text:p>
      <text:p text:style-name="P8" loext:marker-style-name="T5"><text:span text:style-name="T6">db.unicorns.find({gender: 'm'}, {loves: 0, _id: 0})</text:span><text:span text:style-name="T6"/></text:p>
      <text:p text:style-name="Standard"><draw:frame draw:style-name="fr1" draw:name="Изображение11" text:anchor-type="as-char" svg:width="14.314cm" svg:height="3.731cm" draw:z-index="10"><draw:image xlink:href="Pictures/100000010000043A0000011A2AD79FB1.png" xlink:type="simple" xlink:show="embed" xlink:actuate="onLoad" draw:mime-type="image/png"/></draw:frame></text:p>
      <text:h text:style-name="Heading_20_3" text:outline-level="3">Задание 2.2.3 - Сортировка по порядку добавления</text:h>
      <text:p text:style-name="P6">Формулировка: вывести список единорогов в обратном порядке добавления, используя параметр $natural.</text:p>
      <text:p text:style-name="P8" loext:marker-style-name="T5"><text:span text:style-name="T6">db.unicorns.find().sort({$natural: -1})</text:span><text:span text:style-name="T6"/></text:p>
      <text:p text:style-name="Standard"><draw:frame draw:style-name="fr1" draw:name="Изображение12" text:anchor-type="as-char" svg:width="8.281cm" svg:height="4.974cm" draw:z-index="11"><draw:image xlink:href="Pictures/1000000100000272000001781C2FB1BC.png" xlink:type="simple" xlink:show="embed" xlink:actuate="onLoad" draw:mime-type="image/png"/></draw:frame></text:p>
      <text:h text:style-name="Heading_20_3" text:outline-level="3">Задание 2.1.4 - Оператор $slice</text:h>
      <text:p text:style-name="P6">Формулировка: вывести список единорогов с названием первого любимого предпочтения, исключив идентификатор.</text:p>
      <text:p text:style-name="P8" loext:marker-style-name="T5"><text:span text:style-name="T6">db.unicorns.find({}, {name: 1, loves: {$slice: 1}, _id: 0})</text:span><text:span text:style-name="T6"/></text:p>
      <text:p text:style-name="P10"><text:span text:style-name="T7">[</text:span><draw:frame draw:style-name="fr1" draw:name="Изображение13" text:anchor-type="as-char" svg:width="10.292cm" svg:height="4.128cm" draw:z-index="12"><draw:image xlink:href="Pictures/100000010000030A0000013889A52C1E.png" xlink:type="simple" xlink:show="embed" xlink:actuate="onLoad" draw:mime-type="image/png"/></draw:frame></text:p>
      <text:p text:style-name="Standard"/>
      <text:h text:style-name="Heading_20_3" text:outline-level="3">Задание 2.3.1 - Операторы сравнения $gte/$lte</text:h>
      <text:p text:style-name="P6">Формулировка: вывести список самок единорогов весом от полутонны (500 кг) до 700 кг, исключив вывод идентификатора.</text:p>
      <text:p text:style-name="P8" loext:marker-style-name="T5"><text:soft-page-break/><text:span text:style-name="T6">db.unicorns.find(</text:span><text:span text:style-name="T6"/></text:p>
      <text:p text:style-name="P8" loext:marker-style-name="T5"><text:span text:style-name="T6"><text:s text:c="4"/>{gender: 'f', weight: {$gte: 500, $lte: 700}},</text:span><text:span text:style-name="T6"/></text:p>
      <text:p text:style-name="P8"><text:span text:style-name="T6"><text:s text:c="4"/></text:span><text:span text:style-name="T4">{_id: 0}</text:span></text:p>
      <text:p text:style-name="P8"><text:span text:style-name="T4">)</text:span></text:p>
      <text:p text:style-name="Standard"><draw:frame draw:style-name="fr1" draw:name="Изображение14" text:anchor-type="as-char" svg:width="9.022cm" svg:height="7.911cm" draw:z-index="13"><draw:image xlink:href="Pictures/10000001000002AA0000025684F54238.png" xlink:type="simple" xlink:show="embed" xlink:actuate="onLoad" draw:mime-type="image/png"/></draw:frame></text:p>
      <text:h text:style-name="Heading_20_3" text:outline-level="3">Задание 2.3.2 - Оператор $all</text:h>
      <text:p text:style-name="P6">Формулировка: вывести список самцов единорогов весом от полутонны (500 кг), предпочитающих одновременно grape и lemon, исключив вывод идентификатора.</text:p>
      <text:p text:style-name="Standard"><draw:frame draw:style-name="fr1" draw:name="Изображение15" text:anchor-type="as-char" svg:width="11.721cm" svg:height="3.889cm" draw:z-index="14"><draw:image xlink:href="Pictures/10000001000003760000012628A2DA2E.png" xlink:type="simple" xlink:show="embed" xlink:actuate="onLoad" draw:mime-type="image/png"/></draw:frame></text:p>
      <text:h text:style-name="Heading_20_3" text:outline-level="3">Задание 2.3.3 - Оператор $exists</text:h>
      <text:p text:style-name="P6">Формулировка: найти всех единорогов, не имеющих ключ vampires.</text:p>
      <text:p text:style-name="P8" loext:marker-style-name="T5"><text:span text:style-name="T6">db.unicorns.find({vampires: {$exists: false}})</text:span><text:span text:style-name="T6"/></text:p>
      <text:p text:style-name="Standard"><draw:frame draw:style-name="fr1" draw:name="Изображение16" text:anchor-type="as-char" svg:width="8.943cm" svg:height="2.91cm" draw:z-index="15"><draw:image xlink:href="Pictures/10000001000002A4000000DCADAF6176.png" xlink:type="simple" xlink:show="embed" xlink:actuate="onLoad" draw:mime-type="image/png"/></draw:frame></text:p>
      <text:h text:style-name="Heading_20_3" text:outline-level="3">Задание 2.3.4 - Комбинация sort и $slice</text:h>
      <text:p text:style-name="P6">Формулировка: вывести упорядоченный список имён самцов единорогов с информацией об их первом предпочтении.</text:p>
      <text:p text:style-name="P8" loext:marker-style-name="T5"><text:soft-page-break/><text:span text:style-name="T6">db.unicorns.find(</text:span><text:span text:style-name="T6"/></text:p>
      <text:p text:style-name="P8" loext:marker-style-name="T5"><text:span text:style-name="T6"><text:s text:c="4"/>{gender: 'm'},</text:span><text:span text:style-name="T6"/></text:p>
      <text:p text:style-name="P8" loext:marker-style-name="T5"><text:span text:style-name="T6"><text:s text:c="4"/>{name: 1, loves: {$slice: 1}, _id: 0}</text:span><text:span text:style-name="T6"/></text:p>
      <text:p text:style-name="P8" loext:marker-style-name="T5"><text:span text:style-name="T6">).sort({name: 1})</text:span><text:span text:style-name="T6"/></text:p>
      <text:p text:style-name="Standard"><draw:frame draw:style-name="fr1" draw:name="Изображение17" text:anchor-type="as-char" svg:width="8.176cm" svg:height="3.704cm" draw:z-index="16"><draw:image xlink:href="Pictures/100000010000026A00000118551EFC62.png" xlink:type="simple" xlink:show="embed" xlink:actuate="onLoad" draw:mime-type="image/png"/></draw:frame></text:p>
      <text:h text:style-name="Heading_20_3" text:outline-level="3">Задание 3.1.1 - Запрос к вложенным объектам (коллекция towns)</text:h>
      <text:p text:style-name="P6">Формулировка: создать коллекцию towns с тремя документами о городах (с вложенным документом mayor). Сформировать запрос, возвращающий список городов с независимыми мэрами (party = "I"), вывести только название города и информацию о мэре. Сформировать запрос, возвращающий список беспартийных мэров (party отсутствует), вывести только название города и информацию о мэре.</text:p>
      <text:p text:style-name="P8" loext:marker-style-name="T5"><text:span text:style-name="T6">db.towns.insert({</text:span><text:span text:style-name="T6"/></text:p>
      <text:p text:style-name="P8" loext:marker-style-name="T5"><text:span text:style-name="T6"><text:s text:c="4"/>name: "Punxsutawney",</text:span><text:span text:style-name="T6"/></text:p>
      <text:p text:style-name="P8" loext:marker-style-name="T5"><text:span text:style-name="T6"><text:s text:c="4"/>population: 6200,</text:span><text:span text:style-name="T6"/></text:p>
      <text:p text:style-name="P8" loext:marker-style-name="T5"><text:span text:style-name="T6"><text:s text:c="4"/>last_sensus: ISODate("2008-01-31"),</text:span><text:span text:style-name="T6"/></text:p>
      <text:p text:style-name="P8" loext:marker-style-name="T5"><text:span text:style-name="T6"><text:s text:c="4"/>famous_for: [""],</text:span><text:span text:style-name="T6"/></text:p>
      <text:p text:style-name="P8" loext:marker-style-name="T5"><text:span text:style-name="T6"><text:s text:c="4"/>mayor: { name: "Jim Wehrle" }</text:span><text:span text:style-name="T6"/></text:p>
      <text:p text:style-name="P8" loext:marker-style-name="T5"><text:span text:style-name="T6">});</text:span><text:span text:style-name="T6"/></text:p>
      <text:p text:style-name="P12" loext:marker-style-name="T5"/>
      <text:p text:style-name="P8" loext:marker-style-name="T5"><text:span text:style-name="T6">db.towns.insert({</text:span><text:span text:style-name="T6"/></text:p>
      <text:p text:style-name="P8" loext:marker-style-name="T5"><text:span text:style-name="T6"><text:s text:c="4"/>name: "New York",</text:span><text:span text:style-name="T6"/></text:p>
      <text:p text:style-name="P8" loext:marker-style-name="T5"><text:span text:style-name="T6"><text:s text:c="4"/>population: 22200000,</text:span><text:span text:style-name="T6"/></text:p>
      <text:p text:style-name="P8" loext:marker-style-name="T5"><text:span text:style-name="T6"><text:s text:c="4"/>last_sensus: ISODate("2009-07-31"),</text:span><text:span text:style-name="T6"/></text:p>
      <text:p text:style-name="P8" loext:marker-style-name="T5"><text:span text:style-name="T6"><text:s text:c="4"/>famous_for: ["status of liberty", "food"],</text:span><text:span text:style-name="T6"/></text:p>
      <text:p text:style-name="P8" loext:marker-style-name="T5"><text:span text:style-name="T6"><text:s text:c="4"/>mayor: { name: "Michael Bloomberg", party: "I" }</text:span><text:span text:style-name="T6"/></text:p>
      <text:p text:style-name="P8" loext:marker-style-name="T5"><text:span text:style-name="T6">});</text:span><text:span text:style-name="T6"/></text:p>
      <text:p text:style-name="P12" loext:marker-style-name="T5"/>
      <text:p text:style-name="P8" loext:marker-style-name="T5"><text:span text:style-name="T6">db.towns.insert({</text:span><text:span text:style-name="T6"/></text:p>
      <text:p text:style-name="P8" loext:marker-style-name="T5"><text:span text:style-name="T6"><text:s text:c="4"/>name: "Portland",</text:span><text:span text:style-name="T6"/></text:p>
      <text:p text:style-name="P8" loext:marker-style-name="T5"><text:span text:style-name="T6"><text:s text:c="4"/>population: 528000,</text:span><text:span text:style-name="T6"/></text:p>
      <text:p text:style-name="P8" loext:marker-style-name="T5"><text:span text:style-name="T6"><text:s text:c="4"/>last_sensus: ISODate("2009-07-20"),</text:span><text:span text:style-name="T6"/></text:p>
      <text:p text:style-name="P8" loext:marker-style-name="T5"><text:span text:style-name="T6"><text:s text:c="4"/>famous_for: ["beer", "food"],</text:span><text:span text:style-name="T6"/></text:p>
      <text:p text:style-name="P8" loext:marker-style-name="T5"><text:span text:style-name="T6"><text:s text:c="4"/>mayor: { name: "Sam Adams", party: "D" }</text:span><text:span text:style-name="T6"/></text:p>
      <text:p text:style-name="P8"><text:span text:style-name="T4">});</text:span></text:p>
      <text:p text:style-name="P8"/>
      <text:p text:style-name="P8"><text:span text:style-name="T4">// Города с независимыми мэрами (party = "I")</text:span></text:p>
      <text:p text:style-name="P8" loext:marker-style-name="T5"><text:span text:style-name="T6">db.towns.find({"mayor.party": "I"}, {name: 1, mayor: 1, _id: 0})</text:span><text:span text:style-name="T6"/></text:p>
      <text:p text:style-name="P12" loext:marker-style-name="T5"/>
      <text:p text:style-name="P8" loext:marker-style-name="T5"><text:span text:style-name="T6">// </text:span><text:span text:style-name="T4">Беспартийные</text:span><text:span text:style-name="T6"> </text:span><text:span text:style-name="T4">мэры</text:span><text:span text:style-name="T6"> (party </text:span><text:span text:style-name="T4">отсутствует</text:span><text:span text:style-name="T6">)</text:span></text:p>
      <text:p text:style-name="P8" loext:marker-style-name="T5"><text:soft-page-break/><text:span text:style-name="T6">db.towns.find({"mayor.party": {$exists: false}}, {name: 1, mayor: 1, _id: 0})</text:span><text:span text:style-name="T6"/></text:p>
      <text:p text:style-name="P10"><text:span text:style-name="T7">[</text:span></text:p>
      <text:h text:style-name="Heading_20_3" text:outline-level="3">Задание 3.1.2 - Функции на JavaScript, курсоры</text:h>
      <text:p text:style-name="P6">Формулировка: сформировать функцию для вывода списка самцов единорогов. Создать курсор для этого списка из первых двух особей с сортировкой в лексикографическом порядке. Вывести результат, используя forEach.</text:p>
      <text:p text:style-name="P8"><text:span text:style-name="T4">// Функция для вывода списка самцов единорогов</text:span></text:p>
      <text:p text:style-name="P8" loext:marker-style-name="T6"><text:span text:style-name="T4">fn_males = function() { return this.gender == "m"; }</text:span><text:span text:style-name="T6"/></text:p>
      <text:p text:style-name="P8" loext:marker-style-name="T5"><draw:frame draw:style-name="fr1" draw:name="Изображение18" text:anchor-type="as-char" svg:width="14.261cm" svg:height="15.558cm" draw:z-index="17"><draw:image xlink:href="Pictures/100000010000043600000498148E9706.png" xlink:type="simple" xlink:show="embed" xlink:actuate="onLoad" draw:mime-type="image/png"/></draw:frame></text:p>
      <text:p text:style-name="P8"/>
      <text:p text:style-name="P8"><text:span text:style-name="T4">// Курсор: первые два самца с сортировкой по имени (лексикографический порядок)</text:span></text:p>
      <text:p text:style-name="P8" loext:marker-style-name="T5"><text:span text:style-name="T6">var cursor = db.unicorns.find({gender: 'm'}).sort({name: 1}).limit(2); null;</text:span><text:span text:style-name="T6"/></text:p>
      <text:p text:style-name="P12" loext:marker-style-name="T5"/>
      <text:p text:style-name="P8" loext:marker-style-name="T6"><text:span text:style-name="T6">// </text:span><text:span text:style-name="T4">Вывод</text:span><text:span text:style-name="T6"> </text:span><text:span text:style-name="T4">результата</text:span><text:span text:style-name="T6"> </text:span><text:span text:style-name="T4">через</text:span><text:span text:style-name="T6"> forEach</text:span></text:p>
      <text:p text:style-name="P8" loext:marker-style-name="T5"><text:soft-page-break/><draw:frame draw:style-name="fr1" draw:name="Изображение19" text:anchor-type="as-char" svg:width="12.303cm" svg:height="1.905cm" draw:z-index="18"><draw:image xlink:href="Pictures/10000001000003A2000000902F23C361.png" xlink:type="simple" xlink:show="embed" xlink:actuate="onLoad" draw:mime-type="image/png"/></draw:frame></text:p>
      <text:p text:style-name="P8" loext:marker-style-name="T5"><text:span text:style-name="T6">cursor.forEach(function(obj) {</text:span><text:span text:style-name="T6"/></text:p>
      <text:p text:style-name="P8"><text:span text:style-name="T6"><text:s text:c="4"/></text:span><text:span text:style-name="T4">print(obj.name);</text:span></text:p>
      <text:p text:style-name="P8"><text:span text:style-name="T4">})</text:span></text:p>
      <text:p text:style-name="P10"><text:span text:style-name="T7">[</text:span></text:p>
      <text:p text:style-name="Standard"/>
      <text:h text:style-name="Heading_20_3" text:outline-level="3">Задание 3.2.1 - Агрегатная функция count()</text:h>
      <text:p text:style-name="P6">Формулировка: вывести количество самок единорогов весом от полутонны (500 кг) до 600 кг.</text:p>
      <text:p text:style-name="P8" loext:marker-style-name="T5"><text:span text:style-name="T6">db.unicorns.find({gender: 'f', weight: {$gte: 500, $lte: 600}}).count()</text:span><text:span text:style-name="T6"/></text:p>
      <text:p text:style-name="P10"><draw:frame draw:style-name="fr1" draw:name="Изображение20" text:anchor-type="as-char" svg:width="12.144cm" svg:height="0.714cm" draw:z-index="19"><draw:image xlink:href="Pictures/1000000100000396000000367DA7E0F5.png" xlink:type="simple" xlink:show="embed" xlink:actuate="onLoad" draw:mime-type="image/png"/></draw:frame></text:p>
      <text:h text:style-name="Heading_20_3" text:outline-level="3">Задание 3.2.2 - Функция distinct()</text:h>
      <text:p text:style-name="P6">Формулировка: вывести список предпочтений (уникальные значения поля loves).</text:p>
      <text:p text:style-name="P8"><draw:frame draw:style-name="fr1" draw:name="Изображение21" text:anchor-type="as-char" svg:width="5.503cm" svg:height="2.381cm" draw:z-index="20"><draw:image xlink:href="Pictures/10000001000001A0000000B46BABE5FA.png" xlink:type="simple" xlink:show="embed" xlink:actuate="onLoad" draw:mime-type="image/png"/></draw:frame></text:p>
      <text:p text:style-name="Standard"/>
      <text:h text:style-name="Heading_20_3" text:outline-level="3">Задание 3.2.3 - Агрегация aggregate(), группировка</text:h>
      <text:p text:style-name="P6">Формулировка: посчитать количество особей единорогов обоих полов.</text:p>
      <text:p text:style-name="P8" loext:marker-style-name="T5"><text:span text:style-name="T6">db.unicorns.aggregate([</text:span><text:span text:style-name="T6"/></text:p>
      <text:p text:style-name="P8" loext:marker-style-name="T5"><text:span text:style-name="T6"><text:s text:c="4"/>{$group: {_id: "$gender", count: {$sum: 1}}}</text:span><text:span text:style-name="T6"/></text:p>
      <text:p text:style-name="P8"><text:span text:style-name="T4">])</text:span></text:p>
      <text:p text:style-name="Standard"><draw:frame draw:style-name="fr1" draw:name="Изображение22" text:anchor-type="as-char" svg:width="8.308cm" svg:height="1.614cm" draw:z-index="21"><draw:image xlink:href="Pictures/10000001000002740000007A6E3F1A12.png" xlink:type="simple" xlink:show="embed" xlink:actuate="onLoad" draw:mime-type="image/png"/></draw:frame></text:p>
      <text:h text:style-name="Heading_20_3" text:outline-level="3">Задание 3.3.1 - Метод save()</text:h>
      <text:p text:style-name="P6">Формулировка: выполнить команду db.unicorns.save({name: 'Barny', loves: ['grape'], weight: 340, gender: 'm'}). Проверить содержимое коллекции unicorns.</text:p>
      <text:p text:style-name="P8" loext:marker-style-name="T5"><text:span text:style-name="T6">db.unicorns.insertOne({name: 'Barny', loves: ['grape'], weight: 340, gender: 'm'})</text:span><text:span text:style-name="T6"/></text:p>
      <text:p text:style-name="P8"><text:span text:style-name="T4">// Проверка содержимого коллекции</text:span></text:p>
      <text:p text:style-name="P8"><text:span text:style-name="T4">db.unicorns.find({name: 'Barny'})</text:span></text:p>
      <text:p text:style-name="P10" loext:marker-style-name="T5"><text:soft-page-break/><draw:frame draw:style-name="fr1" draw:name="Изображение23" text:anchor-type="as-char" svg:width="7.355cm" svg:height="3.016cm" draw:z-index="22"><draw:image xlink:href="Pictures/100000010000022C000000E4D6FEF5D9.png" xlink:type="simple" xlink:show="embed" xlink:actuate="onLoad" draw:mime-type="image/png"/></draw:frame></text:p>
      <text:p text:style-name="Standard"/>
      <text:h text:style-name="Heading_20_3" text:outline-level="3">Задание 3.3.2 - Метод update() с полной заменой документа</text:h>
      <text:p text:style-name="P6">Формулировка: для самки единорога Ayna внести изменения в БД: теперь её вес 800, она убила 51 вампира. Проверить содержимое коллекции unicorns.</text:p>
      <text:p text:style-name="P8"><text:span text:style-name="T4">db.unicorns.update(</text:span></text:p>
      <text:p text:style-name="P8"><text:span text:style-name="T4"><text:s text:c="4"/>{name: "Ayna"},</text:span></text:p>
      <text:p text:style-name="P8"><text:span text:style-name="T4"><text:s text:c="4"/>{name: "Ayna", loves: ["strawberry", "lemon"], weight: 800, gender: "f", vampires: 51}</text:span></text:p>
      <text:p text:style-name="P8"><text:span text:style-name="T4">)</text:span></text:p>
      <text:p text:style-name="P8"/>
      <text:p text:style-name="P8"><text:span text:style-name="T4">// Проверка</text:span></text:p>
      <text:p text:style-name="P8"><text:span text:style-name="T4">db.unicorns.find({name: "Ayna"})</text:span></text:p>
      <text:p text:style-name="P10" loext:marker-style-name="T5"><draw:frame draw:style-name="fr1" draw:name="Изображение24" text:anchor-type="as-char" svg:width="7.435cm" svg:height="3.334cm" draw:z-index="23"><draw:image xlink:href="Pictures/1000000100000232000000FCB42335B1.png" xlink:type="simple" xlink:show="embed" xlink:actuate="onLoad" draw:mime-type="image/png"/></draw:frame></text:p>
      <text:p text:style-name="Standard"/>
      <text:h text:style-name="Heading_20_3" text:outline-level="3">Задание 3.3.3 - Оператор $set</text:h>
      <text:p text:style-name="P6">Формулировка: для самца единорога Raleigh внести изменения в БД: теперь он любит редбул. Проверить содержимое коллекции unicorns.</text:p>
      <text:p text:style-name="P8"><text:span text:style-name="T4">db.unicorns.update(</text:span></text:p>
      <text:p text:style-name="P8"><text:span text:style-name="T4"><text:s text:c="4"/>{name: "Raleigh"},</text:span></text:p>
      <text:p text:style-name="P8"><text:span text:style-name="T4"><text:s text:c="4"/>{$push: {loves: "redbull"}}</text:span></text:p>
      <text:p text:style-name="P8" loext:marker-style-name="T5"><text:span text:style-name="T6">)</text:span><text:span text:style-name="T6"/></text:p>
      <text:p text:style-name="P12" loext:marker-style-name="T5"/>
      <text:p text:style-name="P8" loext:marker-style-name="T5"><text:span text:style-name="T6">// </text:span><text:span text:style-name="T4">Проверка</text:span></text:p>
      <text:p text:style-name="P8" loext:marker-style-name="T5"><text:span text:style-name="T6">db.unicorns.find({name: "Raleigh"})</text:span><text:span text:style-name="T6"/></text:p>
      <text:p text:style-name="P10"><draw:frame draw:style-name="fr1" draw:name="Изображение25" text:anchor-type="as-char" svg:width="8.043cm" svg:height="3.36cm" draw:z-index="24"><draw:image xlink:href="Pictures/1000000100000260000000FE2F9E1AC7.png" xlink:type="simple" xlink:show="embed" xlink:actuate="onLoad" draw:mime-type="image/png"/></draw:frame></text:p>
      <text:p text:style-name="Standard"><text:soft-page-break/></text:p>
      <text:h text:style-name="Heading_20_3" text:outline-level="3">Задание 3.3.4 - Оператор $inc с параметром multi</text:h>
      <text:p text:style-name="P6">Формулировка: всем самцам единорогов увеличить количество убитых вампиров на 5. Проверить содержимое коллекции unicorns.</text:p>
      <text:p text:style-name="P8" loext:marker-style-name="T5"><text:span text:style-name="T6">db.unicorns.update(</text:span><text:span text:style-name="T6"/></text:p>
      <text:p text:style-name="P8" loext:marker-style-name="T5"><text:span text:style-name="T6"><text:s text:c="4"/>{gender: "m"},</text:span><text:span text:style-name="T6"/></text:p>
      <text:p text:style-name="P8" loext:marker-style-name="T5"><text:span text:style-name="T6"><text:s text:c="4"/>{$inc: {vampires: 5}},</text:span><text:span text:style-name="T6"/></text:p>
      <text:p text:style-name="P8" loext:marker-style-name="T5"><text:span text:style-name="T6"><text:s text:c="4"/>{multi: true}</text:span><text:span text:style-name="T6"/></text:p>
      <text:p text:style-name="P8" loext:marker-style-name="T5"><text:span text:style-name="T6">)</text:span><text:span text:style-name="T6"/></text:p>
      <text:p text:style-name="P12" loext:marker-style-name="T5"/>
      <text:p text:style-name="P8" loext:marker-style-name="T5"><text:span text:style-name="T6">// </text:span><text:span text:style-name="T4">Проверка</text:span></text:p>
      <text:p text:style-name="P8" loext:marker-style-name="T5"><text:span text:style-name="T6">db.unicorns.find({gender: "m"}, {name: 1, vampires: 1, _id: 0})</text:span><text:span text:style-name="T6"/></text:p>
      <text:p text:style-name="Standard"><draw:frame draw:style-name="fr1" draw:name="Изображение26" text:anchor-type="as-char" svg:width="11.668cm" svg:height="2.937cm" draw:z-index="25"><draw:image xlink:href="Pictures/1000000100000372000000DE9BB36E09.png" xlink:type="simple" xlink:show="embed" xlink:actuate="onLoad" draw:mime-type="image/png"/></draw:frame></text:p>
      <text:h text:style-name="Heading_20_3" text:outline-level="3">Задание 3.3.5 - Оператор $unset</text:h>
      <text:p text:style-name="P6">Формулировка: изменить информацию о городе Портланд: мэр этого города теперь беспартийный. Проверить содержимое коллекции towns.</text:p>
      <text:p text:style-name="P8"><text:span text:style-name="T4">db.towns.update(</text:span></text:p>
      <text:p text:style-name="P8"><text:span text:style-name="T4"><text:s text:c="4"/>{name: "Portland"},</text:span></text:p>
      <text:p text:style-name="P8"><text:span text:style-name="T4"><text:s text:c="4"/>{$unset: {"mayor.party": 1}}</text:span></text:p>
      <text:p text:style-name="P8" loext:marker-style-name="T5"><text:span text:style-name="T6">)</text:span><text:span text:style-name="T6"/></text:p>
      <text:p text:style-name="P12" loext:marker-style-name="T5"/>
      <text:p text:style-name="P8" loext:marker-style-name="T5"><text:span text:style-name="T6">// </text:span><text:span text:style-name="T4">Проверка</text:span></text:p>
      <text:p text:style-name="P8" loext:marker-style-name="T5"><text:span text:style-name="T6">db.towns.find({name: "Portland"})</text:span><text:span text:style-name="T6"/></text:p>
      <text:p text:style-name="P10" loext:marker-style-name="T5"><draw:frame draw:style-name="fr1" draw:name="Изображение27" text:anchor-type="as-char" svg:width="8.176cm" svg:height="3.228cm" draw:z-index="26"><draw:image xlink:href="Pictures/100000010000026A000000F463210DC9.png" xlink:type="simple" xlink:show="embed" xlink:actuate="onLoad" draw:mime-type="image/png"/></draw:frame></text:p>
      <text:p text:style-name="Standard"/>
      <text:h text:style-name="Heading_20_3" text:outline-level="3">Задание 3.3.6 - Оператор $push</text:h>
      <text:p text:style-name="P6">Формулировка: изменить информацию о самце единорога Pilot: теперь он любит и шоколад. Проверить содержимое коллекции unicorns.</text:p>
      <text:p text:style-name="P8"><text:span text:style-name="T4">db.unicorns.update(</text:span></text:p>
      <text:p text:style-name="P8"><text:span text:style-name="T4"><text:s text:c="4"/>{name: "Pilot"},</text:span></text:p>
      <text:p text:style-name="P8"><text:span text:style-name="T4"><text:s text:c="4"/>{$push: {loves: "chocolate"}}</text:span></text:p>
      <text:p text:style-name="P8" loext:marker-style-name="T5"><text:span text:style-name="T6">)</text:span><text:span text:style-name="T6"/></text:p>
      <text:p text:style-name="P12" loext:marker-style-name="T5"><text:soft-page-break/></text:p>
      <text:p text:style-name="P8" loext:marker-style-name="T5"><text:span text:style-name="T6">// </text:span><text:span text:style-name="T4">Проверка</text:span></text:p>
      <text:p text:style-name="P8" loext:marker-style-name="T5"><text:span text:style-name="T6">db.unicorns.find({name: "Pilot"})</text:span><text:span text:style-name="T6"/></text:p>
      <text:p text:style-name="Standard"><draw:frame draw:style-name="fr1" draw:name="Изображение28" text:anchor-type="as-char" svg:width="8.255cm" svg:height="3.122cm" draw:z-index="27"><draw:image xlink:href="Pictures/1000000100000270000000EC14AB64C3.png" xlink:type="simple" xlink:show="embed" xlink:actuate="onLoad" draw:mime-type="image/png"/></draw:frame></text:p>
      <text:h text:style-name="Heading_20_3" text:outline-level="3">Задание 3.3.7 - Оператор $addToSet с $each</text:h>
      <text:p text:style-name="P6">Формулировка: изменить информацию о самке единорога Aurora: теперь она любит ещё и сахар, и лимоны. Проверить содержимое коллекции unicorns.</text:p>
      <text:p text:style-name="P8"><text:span text:style-name="T4">db.unicorns.update(</text:span></text:p>
      <text:p text:style-name="P8"><text:span text:style-name="T4"><text:s text:c="4"/>{name: "Aurora"},</text:span></text:p>
      <text:p text:style-name="P8"><text:span text:style-name="T4"><text:s text:c="4"/>{$addToSet: {loves: {$each: ["sugar", "lemon"]}}}</text:span></text:p>
      <text:p text:style-name="P8"><text:span text:style-name="T4">)</text:span></text:p>
      <text:p text:style-name="P8"/>
      <text:p text:style-name="P8"><text:span text:style-name="T4">// Проверка</text:span></text:p>
      <text:p text:style-name="P8"><text:span text:style-name="T4">db.unicorns.find({name: "Aurora"})</text:span></text:p>
      <text:p text:style-name="P10" loext:marker-style-name="T5"><draw:frame draw:style-name="fr1" draw:name="Изображение29" text:anchor-type="as-char" svg:width="8.652cm" svg:height="3.254cm" draw:z-index="28"><draw:image xlink:href="Pictures/100000010000028E000000F6A4B90C55.png" xlink:type="simple" xlink:show="embed" xlink:actuate="onLoad" draw:mime-type="image/png"/></draw:frame></text:p>
      <text:p text:style-name="Standard"/>
      <text:h text:style-name="Heading_20_3" text:outline-level="3">Задание 3.4.1 - Удаление документов (remove)</text:h>
      <text:p text:style-name="P6">Формулировка: удалить документы с беспартийными мэрами из коллекции towns. Проверить содержание коллекции. Очистить коллекцию. Просмотреть список доступных коллекций.</text:p>
      <text:p text:style-name="P6">Примечание: коллекция towns с тремя городами уже создана в задании 3.1.1, повторное создание не требуется.</text:p>
      <text:p text:style-name="P8"><text:span text:style-name="T4">// Удаление документов с беспартийными мэрами</text:span></text:p>
      <text:p text:style-name="P8" loext:marker-style-name="T4"><text:span text:style-name="T6">db.towns.remove({"mayor.party": {$exists: false}})</text:span><text:span text:style-name="T6"/></text:p>
      <text:p text:style-name="P8" loext:marker-style-name="T5"><draw:frame draw:style-name="fr1" draw:name="Изображение30" text:anchor-type="as-char" svg:width="16.501cm" svg:height="0.995cm" draw:z-index="29"><draw:image xlink:href="Pictures/100000010000086C000000820818CFBC.png" xlink:type="simple" xlink:show="embed" xlink:actuate="onLoad" draw:mime-type="image/png"/></draw:frame></text:p>
      <text:p text:style-name="P12" loext:marker-style-name="T5"/>
      <text:p text:style-name="P8"><text:span text:style-name="T4">// Проверка содержимого</text:span></text:p>
      <text:p text:style-name="P8"><text:span text:style-name="T4">db.towns.find()</text:span></text:p>
      <text:p text:style-name="P8"><text:soft-page-break/><draw:frame draw:style-name="fr1" draw:name="Изображение31" text:anchor-type="as-char" svg:width="13.547cm" svg:height="4.233cm" draw:z-index="30"><draw:image xlink:href="Pictures/1000000100000400000001C2F364EFEA.png" xlink:type="simple" xlink:show="embed" xlink:actuate="onLoad" draw:mime-type="image/png"/></draw:frame></text:p>
      <text:p text:style-name="P8"><text:span text:style-name="T4">// Очистка коллекции полностью</text:span></text:p>
      <text:p text:style-name="P8"><text:span text:style-name="T4">db.towns.remove({})</text:span></text:p>
      <text:p text:style-name="P8"/>
      <text:p text:style-name="P8"><text:span text:style-name="T4">// Список доступных коллекций</text:span></text:p>
      <text:p text:style-name="P8"><text:span text:style-name="T4">show collections</text:span></text:p>
      <text:p text:style-name="P10"><draw:frame draw:style-name="fr1" draw:name="Изображение32" text:anchor-type="as-char" svg:width="6.588cm" svg:height="1.482cm" draw:z-index="31"><draw:image xlink:href="Pictures/10000001000001F200000070DB7D149E.png" xlink:type="simple" xlink:show="embed" xlink:actuate="onLoad" draw:mime-type="image/png"/></draw:frame></text:p>
      <text:p text:style-name="P13"><text:span text:style-name="T5">Remove</text:span> не удаляет коллекцию как структуру(удаляет документы) так что чтобы полностью удалить коллекцию надо: db.towns.drop()</text:p>
      <text:p text:style-name="Standard"/>
      <text:h text:style-name="Heading_20_3" text:outline-level="3">Задание 4.1.1 - Ссылки между коллекциями (DBRef, 2 способ)</text:h>
      <text:p text:style-name="P6">Формулировка: создать коллекцию зон обитания единорогов, указав в качестве идентификатора краткое название зоны, далее включив полное название и описание. Включить для нескольких единорогов в документы ссылку на зону обитания, используя второй способ автоматического связывания. Проверить содержание коллекции единорогов.</text:p>
      <text:p text:style-name="P8"><text:span text:style-name="T4">// Коллекция зон обитания единорогов</text:span></text:p>
      <text:p text:style-name="P8"><text:span text:style-name="T4">db.habitats.insert({_id: "forest", name: "Enchanted Forest", description: "Древний лес, полный магии"})</text:span></text:p>
      <text:p text:style-name="P8"><text:span text:style-name="T4">db.habitats.insert({_id: "mountain", name: "Crystal Mountains", description: "Горная местность с кристальными пещерами"})</text:span></text:p>
      <text:p text:style-name="P8"/>
      <text:p text:style-name="P8"><text:span text:style-name="T4">// Добавление ссылки на зону обитания (2 способ автоматического связывания через $ref/$id)</text:span></text:p>
      <text:p text:style-name="P8" loext:marker-style-name="T5"><text:span text:style-name="T6">db.unicorns.update(</text:span><text:span text:style-name="T6"/></text:p>
      <text:p text:style-name="P8" loext:marker-style-name="T5"><text:span text:style-name="T6"><text:s text:c="4"/>{name: "Horny"},</text:span><text:span text:style-name="T6"/></text:p>
      <text:p text:style-name="P8" loext:marker-style-name="T5"><text:span text:style-name="T6"><text:s text:c="4"/>{$set: {habitat: {$ref: "habitats", $id: "forest"}}}</text:span><text:span text:style-name="T6"/></text:p>
      <text:p text:style-name="P8" loext:marker-style-name="T5"><text:span text:style-name="T6">)</text:span><text:span text:style-name="T6"/></text:p>
      <text:p text:style-name="P12" loext:marker-style-name="T5"/>
      <text:p text:style-name="P8" loext:marker-style-name="T5"><text:span text:style-name="T6">db.unicorns.update(</text:span><text:span text:style-name="T6"/></text:p>
      <text:p text:style-name="P8" loext:marker-style-name="T5"><text:span text:style-name="T6"><text:s text:c="4"/>{name: "Unicrom"},</text:span><text:span text:style-name="T6"/></text:p>
      <text:p text:style-name="P8" loext:marker-style-name="T5"><text:span text:style-name="T6"><text:s text:c="4"/>{$set: {habitat: {$ref: "habitats", $id: "mountain"}}}</text:span><text:span text:style-name="T6"/></text:p>
      <text:p text:style-name="P8" loext:marker-style-name="T5"><text:span text:style-name="T6">)</text:span><text:span text:style-name="T6"/></text:p>
      <text:p text:style-name="P12" loext:marker-style-name="T5"/>
      <text:p text:style-name="P8" loext:marker-style-name="T5"><text:span text:style-name="T6">// </text:span><text:span text:style-name="T4">Проверка</text:span><text:span text:style-name="T6"> </text:span><text:span text:style-name="T4">содержимого</text:span><text:span text:style-name="T6"> </text:span><text:span text:style-name="T4">коллекции</text:span><text:span text:style-name="T6"> </text:span><text:span text:style-name="T4">единорогов</text:span></text:p>
      <text:p text:style-name="P8" loext:marker-style-name="T6"><text:span text:style-name="T6">db.unicorns.find({habitat: {$exists: true}})</text:span><text:span text:style-name="T6"/></text:p>
      <text:p text:style-name="P8" loext:marker-style-name="T5"><text:soft-page-break/><draw:frame draw:style-name="fr1" draw:name="Изображение33" text:anchor-type="as-char" svg:width="14.975cm" svg:height="11.139cm" draw:z-index="32"><draw:image xlink:href="Pictures/100000010000046C0000034AE0FFBADC.png" xlink:type="simple" xlink:show="embed" xlink:actuate="onLoad" draw:mime-type="image/png"/></draw:frame></text:p>
      <text:p text:style-name="P12" loext:marker-style-name="T5"/>
      <text:p text:style-name="P8"><text:span text:style-name="T4">// Получение сведений о зоне обитания через ссылку</text:span></text:p>
      <text:p text:style-name="P8" loext:marker-style-name="T5"><text:span text:style-name="T6">var horny = db.unicorns.findOne({name: "Horny"})</text:span><text:span text:style-name="T6"/></text:p>
      <text:p text:style-name="P8" loext:marker-style-name="T6"><text:span text:style-name="T6">db.habitats.findOne({_id: horny.habitat.$id})</text:span><text:span text:style-name="T6"/></text:p>
      <text:p text:style-name="P12" loext:marker-style-name="T5"/>
      <text:h text:style-name="Heading_20_3" text:outline-level="3">Задание 4.2.1 - Индексы с флагом unique</text:h>
      <text:p text:style-name="P6">Формулировка: проверить, можно ли задать для коллекции unicorns индекс для ключа name с флагом unique.</text:p>
      <text:p text:style-name="P8"><text:span text:style-name="T4">// Попытка создания unique-индекса по полю name</text:span></text:p>
      <text:p text:style-name="P8" loext:marker-style-name="T5"><text:span text:style-name="T6">db.unicorns.createIndex({"name": 1}, {"unique": true})</text:span><text:span text:style-name="T6"/></text:p>
      <text:p text:style-name="P12" loext:marker-style-name="T5"/>
      <text:p text:style-name="P8"><text:span text:style-name="T4">// Проверка: попытка вставить дубль имени для тестирования ограничения</text:span></text:p>
      <text:p text:style-name="P8" loext:marker-style-name="T5"><text:span text:style-name="T6">db.unicorns.insert({name: "Horny", loves: ["test"], weight: 100, gender: "m"})</text:span><text:span text:style-name="T6"/></text:p>
      <text:p text:style-name="P8" loext:marker-style-name="T6"><text:span text:style-name="T4">// Ожидается ошибка E11000 duplicate key error, так как имя 'Horny' уже существует</text:span><text:span text:style-name="T6"/></text:p>
      <text:p text:style-name="P8" loext:marker-style-name="T5"><draw:frame draw:style-name="fr1" draw:name="Изображение34" text:anchor-type="as-char" svg:width="16.501cm" svg:height="1.279cm" draw:z-index="33"><draw:image xlink:href="Pictures/1000000100000914000000B4394EA4C0.png" xlink:type="simple" xlink:show="embed" xlink:actuate="onLoad" draw:mime-type="image/png"/></draw:frame></text:p>
      <text:p text:style-name="P6">Вывод: индекс с флагом unique для поля name создаётся успешно при условии, что все существующие значения name в коллекции уникальны. После создания такого индекса MongoDB не позволяет вставлять документы с повторяющимся значением name.</text:p>
      <text:p text:style-name="Standard"><text:soft-page-break/></text:p>
      <text:h text:style-name="Heading_20_3" text:outline-level="3">Задание 4.3.1 - Управление индексами</text:h>
      <text:p text:style-name="P6">Формулировка: получить информацию о всех индексах коллекции unicorns. Удалить все индексы, кроме индекса для идентификатора. Попытаться удалить индекс для идентификатора.</text:p>
      <text:p text:style-name="P8"><text:span text:style-name="T4">// Информация о всех индексах коллекции</text:span></text:p>
      <text:p text:style-name="P8" loext:marker-style-name="T6"><text:span text:style-name="T4">db.unicorns.getIndexes()</text:span><text:span text:style-name="T6"/></text:p>
      <text:p text:style-name="P8" loext:marker-style-name="T5"><draw:frame draw:style-name="fr1" draw:name="Изображение35" text:anchor-type="as-char" svg:width="15.663cm" svg:height="2.619cm" draw:z-index="34"><draw:image xlink:href="Pictures/10000001000004A0000000C6CBF76DAB.png" xlink:type="simple" xlink:show="embed" xlink:actuate="onLoad" draw:mime-type="image/png"/></draw:frame></text:p>
      <text:p text:style-name="P8"/>
      <text:p text:style-name="P8"><text:span text:style-name="T4">// Удаление индекса по полю name (созданного в задании 4.2.1)</text:span></text:p>
      <text:p text:style-name="P8"><text:span text:style-name="T4">db.unicorns.dropIndex("name_1")</text:span></text:p>
      <text:p text:style-name="P8"/>
      <text:p text:style-name="P8"><text:span text:style-name="T4">// Проверка - остался только индекс _id_</text:span></text:p>
      <text:p text:style-name="P8" loext:marker-style-name="T6"><text:span text:style-name="T4">db.unicorns.getIndexes()</text:span><text:span text:style-name="T6"/></text:p>
      <text:p text:style-name="P8" loext:marker-style-name="T5"><draw:frame draw:style-name="fr1" draw:name="Изображение36" text:anchor-type="as-char" svg:width="11.589cm" svg:height="1.032cm" draw:z-index="35"><draw:image xlink:href="Pictures/100000010000036C0000004E7A38BB3B.png" xlink:type="simple" xlink:show="embed" xlink:actuate="onLoad" draw:mime-type="image/png"/></draw:frame></text:p>
      <text:p text:style-name="P8"/>
      <text:p text:style-name="P8"><text:span text:style-name="T4">// Попытка удалить индекс для идентификатора _id</text:span></text:p>
      <text:p text:style-name="P8" loext:marker-style-name="T6"><text:span text:style-name="T4">db.unicorns.dropIndex("_id_")</text:span><text:span text:style-name="T6"/></text:p>
      <text:p text:style-name="P8" loext:marker-style-name="T5"><draw:frame draw:style-name="fr1" draw:name="Изображение37" text:anchor-type="as-char" svg:width="14.473cm" svg:height="1.323cm" draw:z-index="36"><draw:image xlink:href="Pictures/100000010000044600000064A036BC4D.png" xlink:type="simple" xlink:show="embed" xlink:actuate="onLoad" draw:mime-type="image/png"/></draw:frame></text:p>
      <text:p text:style-name="P8"><text:span text:style-name="T4">// Ожидается ошибка - индекс _id_ нельзя удалить, так как он системный</text:span></text:p>
      <text:p text:style-name="Standard"/>
      <text:h text:style-name="Heading_20_3" text:outline-level="3">Задание 4.4.1 - План запроса (explain), сравнение с индексом и без</text:h>
      <text:p text:style-name="P6">Формулировка: создать объёмную коллекцию numbers (100 000 документов). Выбрать последние четыре документа. Проанализировать план выполнения запроса (значение executionTimeMillis). Создать индекс для ключа value. Получить информацию о всех индексах коллекции numbers. Выполнить запрос повторно. Проанализировать план выполнения запроса с установленным индексом. Сравнить время выполнения запросов.</text:p>
      <text:p text:style-name="P8"><text:span text:style-name="T4">// Создание объёмной коллекции numbers (100 000 документов)</text:span></text:p>
      <text:p text:style-name="P8"><text:span text:style-name="T4">for (i = 0; i &lt; 100000; i++) { db.numbers.insert({value: i}) }</text:span></text:p>
      <text:p text:style-name="P6"><draw:frame draw:style-name="fr1" draw:name="Изображение38" text:anchor-type="as-char" svg:width="16.501cm" svg:height="2.17cm" draw:z-index="37"><draw:image xlink:href="Pictures/100000010000054A000000B2EDC0B7BA.png" xlink:type="simple" xlink:show="embed" xlink:actuate="onLoad" draw:mime-type="image/png"/></draw:frame>Запрос на выбор последних четырёх документов без индекса:</text:p>
      <text:p text:style-name="P8" loext:marker-style-name="T5"><text:soft-page-break/><text:span text:style-name="T6">db.numbers.find().sort({$natural: -1}).limit(4)</text:span><text:span text:style-name="T6"/></text:p>
      <text:p text:style-name="P6"><draw:frame draw:style-name="fr1" draw:name="Изображение39" text:anchor-type="as-char" svg:width="16.166cm" svg:height="3.704cm" draw:z-index="38"><draw:image xlink:href="Pictures/10000001000004C6000001183EDDB5E7.png" xlink:type="simple" xlink:show="embed" xlink:actuate="onLoad" draw:mime-type="image/png"/></draw:frame>Анализ плана выполнения запроса без индекса:</text:p>
      <text:p text:style-name="P8" loext:marker-style-name="T5"><text:span text:style-name="T6">db.numbers.explain("executionStats").find().sort({$natural: -1}).limit(4)</text:span><text:span text:style-name="T6"/></text:p>
      <text:p text:style-name="P8" loext:marker-style-name="T5"><text:span text:style-name="T6">// </text:span><text:span text:style-name="T4">Смотрим</text:span><text:span text:style-name="T6"> </text:span><text:span text:style-name="T4">значение</text:span><text:span text:style-name="T6"> </text:span><text:span text:style-name="T4">поля</text:span><text:span text:style-name="T6"> executionStats.executionTimeMillis</text:span></text:p>
      <text:p text:style-name="P10" loext:marker-style-name="T5"><draw:frame draw:style-name="fr1" draw:name="Изображение40" text:anchor-type="as-char" svg:width="6.112cm" svg:height="0.476cm" draw:z-index="39"><draw:image xlink:href="Pictures/10000001000001CE000000246F57FCD0.png" xlink:type="simple" xlink:show="embed" xlink:actuate="onLoad" draw:mime-type="image/png"/></draw:frame></text:p>
      <text:p text:style-name="P6">Создание индекса для поля value:</text:p>
      <text:p text:style-name="P8"><text:span text:style-name="T4">db.numbers.createIndex({"value": 1})</text:span></text:p>
      <text:p text:style-name="P10"><draw:frame draw:style-name="fr1" draw:name="Изображение41" text:anchor-type="as-char" svg:width="9.869cm" svg:height="1.852cm" draw:z-index="40"><draw:image xlink:href="Pictures/10000001000002EA0000008C7BE8091A.png" xlink:type="simple" xlink:show="embed" xlink:actuate="onLoad" draw:mime-type="image/png"/></draw:frame></text:p>
      <text:p text:style-name="P6">Информация о всех индексах коллекции numbers:</text:p>
      <text:p text:style-name="P8"><text:span text:style-name="T4">db.numbers.getIndexes()</text:span></text:p>
      <text:p text:style-name="P10"><draw:frame draw:style-name="fr1" draw:name="Изображение42" text:anchor-type="as-char" svg:width="10.53cm" svg:height="3.016cm" draw:z-index="41"><draw:image xlink:href="Pictures/100000010000031C000000E490D9516F.png" xlink:type="simple" xlink:show="embed" xlink:actuate="onLoad" draw:mime-type="image/png"/></draw:frame></text:p>
      <text:p text:style-name="P6">Повторное выполнение эквивалентного запроса (по полю value, использующего индекс):</text:p>
      <text:p text:style-name="P8" loext:marker-style-name="T5"><text:span text:style-name="T6">db.numbers.find().sort({value: -1}).limit(4)</text:span><text:span text:style-name="T6"/></text:p>
      <text:p text:style-name="P10"><draw:frame draw:style-name="fr1" draw:name="Изображение43" text:anchor-type="as-char" svg:width="14.102cm" svg:height="3.307cm" draw:z-index="42"><draw:image xlink:href="Pictures/100000010000042A000000FAE8739972.png" xlink:type="simple" xlink:show="embed" xlink:actuate="onLoad" draw:mime-type="image/png"/></draw:frame></text:p>
      <text:p text:style-name="P6">Анализ плана выполнения запроса с установленным индексом:</text:p>
      <text:p text:style-name="P8" loext:marker-style-name="T5"><text:span text:style-name="T6">db.numbers.explain("executionStats").find().sort({value: -1}).limit(4)</text:span><text:span text:style-name="T6"/></text:p>
      <text:p text:style-name="P8"><text:span text:style-name="T4">// Сравниваем executionTimeMillis до и после создания индекса</text:span></text:p>
      <text:p text:style-name="P10"><draw:frame draw:style-name="fr1" draw:name="Изображение44" text:anchor-type="as-char" svg:width="6.085cm" svg:height="0.503cm" draw:z-index="43"><draw:image xlink:href="Pictures/10000001000001CC00000026DA3BAC01.png" xlink:type="simple" xlink:show="embed" xlink:actuate="onLoad" draw:mime-type="image/png"/></draw:frame></text:p>
      <text:p text:style-name="P6">Сравнение времени выполнения запроса:</text:p>
      <table:table table:name="Таблица1" table:style-name="Таблица1">
        <table:table-column table:style-name="Таблица1.A" table:number-columns-repeated="2"/>
        <table:table-header-rows>
          <text:soft-page-break/>
          <table:table-row table:style-name="Таблица1.1">
            <table:table-cell table:style-name="Таблица1.A1" office:value-type="string">
              <text:p text:style-name="P14"><text:span text:style-name="T8">Без индекса</text:span></text:p>
            </table:table-cell>
            <table:table-cell table:style-name="Таблица1.A1" office:value-type="string">
              <text:p text:style-name="P14"><text:span text:style-name="T8">С индексом</text:span>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14"><text:span text:style-name="T9">executionTimeMillis: 4</text:span></text:p>
          </table:table-cell>
          <table:table-cell table:style-name="Таблица1.A2" office:value-type="string">
            <text:p text:style-name="P14"><text:span text:style-name="T9">executionTimeMillis</text:span><text:span text:style-name="T10">: </text:span><text:span text:style-name="T9">2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</table:table>
      <text:p text:style-name="Standard"/>
      <text:p text:style-name="P6">Вывод: запрос с использованием индекса по полю value существенно эффективнее, так как позволяет сразу перейти к нужным документам по упорядоченной структуре индекса (B-tree), без необходимости просматривать все 100 000 документов коллекции последовательно. Это отражается в значительно меньшем количестве просмотренных документов (totalDocsExamined) и сокращении времени выполнения (executionTimeMillis).</text:p>
      <text:h text:style-name="P15" text:outline-level="1"><text:span text:style-name="T3">Общие выводы</text:span></text:h>
      <text:p text:style-name="P6">В ходе выполнения лабораторной работы №6 были получены практические навыки установки и начальной настройки документоориентированной СУБД MongoDB, а также всестороннего освоения CRUD-операций (создание, чтение, обновление, удаление документов).</text:p>
      <text:p text:style-name="P6">Изучены способы фильтрации данных с использованием логических операторов ($gt, $lt, $in, $all, $exists, $or, $regex), работа с вложенными объектами и массивами (оператор точка, $slice), применение курсоров и пользовательских функций на JavaScript для обработки результатов запросов.</text:p>
      <text:p text:style-name="P6">Освоены методы агрегации данных (count, distinct, aggregate с группировкой), различные способы модификации документов (save, update с операторами $set, $inc, $unset, $push, $addToSet, $pop, $pull), а также удаление документов и коллекций.</text:p>
      <text:p text:style-name="P6">Изучены способы организации связей между коллекциями посредством DBRef и ручных ссылок, а также работа с индексами: создание простых и уникальных индексов, управление ими, и анализ эффективности запросов с помощью метода explain(). Практически подтверждено, что использование индексов значительно повышает производительность выборки данных на больших объёмах документов за счёт сокращения количества просматриваемых записей.</text:p>
      <text:p text:style-name="P6">В целом, MongoDB продемонстрировала гибкость модели данных, отсутствие необходимости в жёсткой схеме и удобство работы со сложноструктурированными данными по сравнению с классическими реляционными СУБД.</text:p>
      <text:h text:style-name="P15" text:outline-level="1"><text:soft-page-break/><text:span text:style-name="T3">Список источников</text:span></text:h>
      <text:list text:style-name="WWNum3">
        <text:list-item text:start-value="1">
          <text:p text:style-name="P16">MоngoDB. Документация [Электронный ресурс] // Официальный сайт MоngoDB. URL: https://docs.mongodb.com/manual/tutorial/manage-mongodb-processes/ (дата обращения: 1<text:span text:style-name="T2">2</text:span>.06.2026).</text:p>
        </text:list-item>
        <text:list-item>
          <text:p text:style-name="P16">MоngoDB CRUD Operations [Электронный ресурс] // MоngoDB Documentation: официальный сайт MоngoDB. URL: https://docs.mongodb.com/manual/crud/ (дата обращения: 1<text:span text:style-name="T2">2</text:span>.06.2026).</text:p>
        </text:list-item>
        <text:list-item>
          <text:p text:style-name="P16">MоngoDB - Краткое руководство [Электронный ресурс] // CoderLessons.com. URL: https://coderlessons.com/tutorials/bazy-dannykh/uchitsia-mongodb/mongodb-kratkoe-rukovodstvo (дата обращения: 1<text:span text:style-name="T2">2</text:span>.06.2026).</text:p>
          <text:p text:style-name="P1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.494cm" fo:margin-bottom="0.247cm" style:contextual-spacing="false" fo:text-align="left" style:justify-single-word="false" fo:orphans="2" fo:widows="2" style:writing-mode="lr-tb"/>
      <style:text-properties fo:font-size="15pt" fo:font-weight="bold" style:font-size-asian="15pt" style:font-weight-asian="bold" style:font-size-complex="15pt" style:font-weight-complex="bold"/>
    </style:style>
    <style:style style:name="Heading_20_2" style:display-name="Heading 2" style:family="paragraph" style:default-outline-level="2" style:list-style-name="" style:class="chapter">
      <style:paragraph-properties fo:margin-top="0.353cm" fo:margin-bottom="0.176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Heading_20_3" style:display-name="Heading 3" style:family="paragraph" style:default-outline-level="3" style:list-style-name="" style:class="chapter">
      <style:paragraph-properties fo:margin-top="0.282cm" fo:margin-bottom="0.141cm" style:contextual-spacing="false" fo:text-align="left" style:justify-single-word="false" fo:orphans="2" fo:widows="2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left" style:justify-single-word="false" fo:orphans="2" fo:widows="2" style:writing-mode="lr-tb"/>
      <style:text-properties fo:font-size="28pt" style:font-size-asian="28pt" style:font-size-complex="28pt"/>
    </style:style>
    <style:style style:name="Строгий1" style:family="paragraph">
      <style:paragraph-properties fo:margin-top="0cm" fo:margin-bottom="0cm" style:contextual-spacing="false" fo:text-align="lef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2" fo:widows="2" style:writing-mode="lr-tb"/>
    </style:style>
    <style:style style:name="Footnote" style:family="paragraph" loext:linked-style-name="Текст_20_сноски_20_Знак" style:class="extra">
      <style:paragraph-properties fo:margin-top="0cm" fo:margin-bottom="0cm" style:contextual-spacing="false" fo:text-align="lef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Текст_20_концевой_20_сноски_20_Знак" style:class="extra">
      <style:paragraph-properties fo:margin-top="0cm" fo:margin-bottom="0cm" style:contextual-spacing="false" fo:text-align="left" style:justify-single-word="false" fo:orphans="2" fo:widows="2" style:writing-mode="lr-tb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3</meta:editing-cycles>
    <meta:creation-date>2026-06-17T04:36:00</meta:creation-date>
    <dc:date>2026-06-26T15:05:42.582945197</dc:date>
    <meta:editing-duration>PT1H5M8S</meta:editing-duration>
    <meta:generator>LibreOffice/26.2.3.2$Linux_X86_64 LibreOffice_project/620$Build-2</meta:generator>
    <meta:document-statistic meta:table-count="1" meta:image-count="44" meta:object-count="0" meta:page-count="21" meta:paragraph-count="337" meta:word-count="2074" meta:character-count="17519" meta:non-whitespace-character-count="15599"/>
    <meta:user-defined meta:name="AppVersion">16.0000</meta:user-defined>
    <meta:template xlink:type="simple" xlink:actuate="onRequest" xlink:title="Normal.dotm" xlink:href=""/>
  </office:meta>
</office:document-meta>
</file>