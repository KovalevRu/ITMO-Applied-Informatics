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_i</text:p>
          </table:table-cell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table:formula="of:=[.A2]+10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,2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table:formula="of:=[.A3]+10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,1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table:formula="of:=[.A4]+10"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table:formula="of:=[.A5]+10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table:formula="of:=[.A6]+10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1.1" calcext:value-type="float">
            <text:p>21,1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table:formula="of:=[.A7]+10"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3.1" calcext:value-type="float">
            <text:p>23,1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formula="of:=[.A8]+10"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3.9" calcext:value-type="float">
            <text:p>23,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9]+10"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.7" calcext:value-type="float">
            <text:p>25,7</text:p>
          </table:table-cell>
        </table:table-row>
        <table:table-row table:style-name="ro1">
          <table:table-cell table:formula="of:=[.A10]+10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table:formula="of:=[.A11]+10"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,5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table:formula="of:=[.A12]+10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30.8" calcext:value-type="float">
            <text:p>30,8</text:p>
          </table:table-cell>
          <table:table-cell office:value-type="float" office:value="31.3" calcext:value-type="float">
            <text:p>31,3</text:p>
          </table:table-cell>
        </table:table-row>
        <table:table-row table:style-name="ro1">
          <table:table-cell table:formula="of:=[.A13]+10"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table:formula="of:=[.A14]+10"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3.1" calcext:value-type="float">
            <text:p>43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2T14:51:41.525766624</meta:creation-date>
    <dc:date>2026-06-12T14:56:45.639225023</dc:date>
    <meta:editing-duration>PT5M4S</meta:editing-duration>
    <meta:editing-cycles>1</meta:editing-cycles>
    <meta:generator>LibreOffice/26.2.3.2$Linux_X86_64 LibreOffice_project/620$Build-2</meta:generator>
    <meta:document-statistic meta:table-count="1" meta:cell-count="60" meta:object-count="0"/>
  </office:meta>
</office:document-meta>
</file>